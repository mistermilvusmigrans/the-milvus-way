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style:page-number="1"/>
    </style:style>
    <style:style style:name="P2" style:parent-style-name="Standard" style:family="paragraph">
      <style:paragraph-properties fo:text-align="center"/>
    </style:style>
    <style:style style:name="T3" style:parent-style-name="DefaultParagraphFont" style:family="text">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style>
    <style:style style:name="P5"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6" style:parent-style-name="DefaultParagraphFont" style:family="text">
      <style:text-properties fo:font-weight="bold" style:font-weight-asian="bold" style:font-weight-complex="bold" fo:color="#000000"/>
    </style:style>
    <style:style style:name="T7" style:parent-style-name="DefaultParagraphFont" style:family="text">
      <style:text-properties fo:font-weight="bold" style:font-weight-asian="bold" style:font-weight-complex="bold" fo:color="#000000"/>
    </style:style>
    <style:style style:name="P8"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P11"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P14"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P17"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P20"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21" style:parent-style-name="DefaultParagraphFont" style:family="text">
      <style:text-properties fo:color="#000000"/>
    </style:style>
    <style:style style:name="T22" style:parent-style-name="DefaultParagraphFont" style:family="text">
      <style:text-properties fo:color="#000000"/>
    </style:style>
    <style:style style:name="P23"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P26"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P29"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30" style:parent-style-name="DefaultParagraphFont" style:family="text">
      <style:text-properties fo:font-weight="bold" style:font-weight-asian="bold" style:font-weight-complex="bold" fo:color="#000000"/>
    </style:style>
    <style:style style:name="T31" style:parent-style-name="DefaultParagraphFont" style:family="text">
      <style:text-properties fo:font-weight="bold" style:font-weight-asian="bold" style:font-weight-complex="bold" fo:color="#000000"/>
    </style:style>
    <style:style style:name="P32"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P35" style:parent-style-name="Standard" style:family="paragraph">
      <style:paragraph-properties fo:margin-top="0.0416in" fo:line-height="100%" fo:margin-left="0.75in">
        <style:tab-stops>
          <style:tab-stop style:type="right" style:leader-style="dotted" style:leader-text="." style:position="8.3333in"/>
        </style:tab-stops>
      </style:paragraph-properties>
    </style:style>
    <style:style style:name="T36" style:parent-style-name="DefaultParagraphFont" style:family="text">
      <style:text-properties fo:color="#000000"/>
    </style:style>
    <style:style style:name="T37" style:parent-style-name="DefaultParagraphFont" style:family="text">
      <style:text-properties fo:color="#000000"/>
    </style:style>
    <style:style style:name="P38" style:parent-style-name="Standard" style:family="paragraph">
      <style:paragraph-properties fo:margin-top="0.0416in" fo:line-height="100%" fo:margin-left="1.25in">
        <style:tab-stops>
          <style:tab-stop style:type="right" style:leader-style="dotted" style:leader-text="." style:position="8.3333in"/>
        </style:tab-stops>
      </style:paragraph-properties>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P41" style:parent-style-name="Standard" style:family="paragraph">
      <style:paragraph-properties fo:margin-top="0.0416in" fo:line-height="100%" fo:margin-left="1.25in">
        <style:tab-stops>
          <style:tab-stop style:type="right" style:leader-style="dotted" style:leader-text="." style:position="8.3333in"/>
        </style:tab-stops>
      </style:paragraph-properties>
    </style:style>
    <style:style style:name="T42" style:parent-style-name="DefaultParagraphFont" style:family="text">
      <style:text-properties fo:color="#000000"/>
    </style:style>
    <style:style style:name="T43" style:parent-style-name="DefaultParagraphFont" style:family="text">
      <style:text-properties fo:color="#000000"/>
    </style:style>
    <style:style style:name="P44"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P47" style:parent-style-name="Standard" style:family="paragraph">
      <style:paragraph-properties fo:margin-top="0.0416in" fo:line-height="100%" fo:margin-left="0.75in">
        <style:tab-stops>
          <style:tab-stop style:type="right" style:leader-style="dotted" style:leader-text="." style:position="8.3333in"/>
        </style:tab-stops>
      </style:paragraph-properties>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P50" style:parent-style-name="Standard" style:family="paragraph">
      <style:paragraph-properties fo:margin-top="0.0416in" fo:line-height="100%" fo:margin-left="0.75in">
        <style:tab-stops>
          <style:tab-stop style:type="right" style:leader-style="dotted" style:leader-text="." style:position="8.3333in"/>
        </style:tab-stops>
      </style:paragraph-properties>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P53"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54" style:parent-style-name="DefaultParagraphFont" style:family="text">
      <style:text-properties fo:font-weight="bold" style:font-weight-asian="bold" style:font-weight-complex="bold" fo:color="#000000"/>
    </style:style>
    <style:style style:name="T55" style:parent-style-name="DefaultParagraphFont" style:family="text">
      <style:text-properties fo:font-weight="bold" style:font-weight-asian="bold" style:font-weight-complex="bold" fo:color="#000000"/>
    </style:style>
    <style:style style:name="P56"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57" style:parent-style-name="DefaultParagraphFont" style:family="text">
      <style:text-properties fo:color="#000000"/>
    </style:style>
    <style:style style:name="T58" style:parent-style-name="DefaultParagraphFont" style:family="text">
      <style:text-properties fo:color="#000000"/>
    </style:style>
    <style:style style:name="P59"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60" style:parent-style-name="DefaultParagraphFont" style:family="text">
      <style:text-properties fo:color="#000000"/>
    </style:style>
    <style:style style:name="T61" style:parent-style-name="DefaultParagraphFont" style:family="text">
      <style:text-properties fo:color="#000000"/>
    </style:style>
    <style:style style:name="P62"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63" style:parent-style-name="DefaultParagraphFont" style:family="text">
      <style:text-properties fo:color="#000000"/>
    </style:style>
    <style:style style:name="T64" style:parent-style-name="DefaultParagraphFont" style:family="text">
      <style:text-properties fo:color="#000000"/>
    </style:style>
    <style:style style:name="P65"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66" style:parent-style-name="DefaultParagraphFont" style:family="text">
      <style:text-properties fo:font-weight="bold" style:font-weight-asian="bold" style:font-weight-complex="bold" fo:color="#000000"/>
    </style:style>
    <style:style style:name="T67" style:parent-style-name="DefaultParagraphFont" style:family="text">
      <style:text-properties fo:font-weight="bold" style:font-weight-asian="bold" style:font-weight-complex="bold" fo:color="#000000"/>
    </style:style>
    <style:style style:name="P68"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69" style:parent-style-name="DefaultParagraphFont" style:family="text">
      <style:text-properties fo:font-weight="bold" style:font-weight-asian="bold" style:font-weight-complex="bold" fo:color="#000000"/>
    </style:style>
    <style:style style:name="T70" style:parent-style-name="DefaultParagraphFont" style:family="text">
      <style:text-properties fo:font-weight="bold" style:font-weight-asian="bold" style:font-weight-complex="bold" fo:color="#000000"/>
    </style:style>
    <style:style style:name="P71"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72" style:parent-style-name="DefaultParagraphFont" style:family="text">
      <style:text-properties fo:font-weight="bold" style:font-weight-asian="bold" style:font-weight-complex="bold" fo:color="#000000"/>
    </style:style>
    <style:style style:name="T73" style:parent-style-name="DefaultParagraphFont" style:family="text">
      <style:text-properties fo:font-weight="bold" style:font-weight-asian="bold" style:font-weight-complex="bold" fo:color="#000000"/>
    </style:style>
    <style:style style:name="P74"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P77"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78" style:parent-style-name="DefaultParagraphFont" style:family="text">
      <style:text-properties fo:color="#000000"/>
    </style:style>
    <style:style style:name="T79" style:parent-style-name="DefaultParagraphFont" style:family="text">
      <style:text-properties fo:color="#000000"/>
    </style:style>
    <style:style style:name="P80"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P83"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84" style:parent-style-name="DefaultParagraphFont" style:family="text">
      <style:text-properties fo:font-weight="bold" style:font-weight-asian="bold" style:font-weight-complex="bold" fo:color="#000000"/>
    </style:style>
    <style:style style:name="T85" style:parent-style-name="DefaultParagraphFont" style:family="text">
      <style:text-properties fo:font-weight="bold" style:font-weight-asian="bold" style:font-weight-complex="bold" fo:color="#000000"/>
    </style:style>
    <style:style style:name="P86"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87" style:parent-style-name="DefaultParagraphFont" style:family="text">
      <style:text-properties fo:font-weight="bold" style:font-weight-asian="bold" style:font-weight-complex="bold" fo:color="#000000"/>
    </style:style>
    <style:style style:name="T88" style:parent-style-name="DefaultParagraphFont" style:family="text">
      <style:text-properties fo:font-weight="bold" style:font-weight-asian="bold" style:font-weight-complex="bold" fo:color="#000000"/>
    </style:style>
    <style:style style:name="P89"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90" style:parent-style-name="DefaultParagraphFont" style:family="text">
      <style:text-properties fo:font-weight="bold" style:font-weight-asian="bold" style:font-weight-complex="bold" fo:color="#000000"/>
    </style:style>
    <style:style style:name="T91" style:parent-style-name="DefaultParagraphFont" style:family="text">
      <style:text-properties fo:font-weight="bold" style:font-weight-asian="bold" style:font-weight-complex="bold" fo:color="#000000"/>
    </style:style>
    <style:style style:name="P92"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93" style:parent-style-name="DefaultParagraphFont" style:family="text">
      <style:text-properties fo:font-weight="bold" style:font-weight-asian="bold" style:font-weight-complex="bold" fo:color="#000000"/>
    </style:style>
    <style:style style:name="T94" style:parent-style-name="DefaultParagraphFont" style:family="text">
      <style:text-properties fo:font-weight="bold" style:font-weight-asian="bold" style:font-weight-complex="bold" fo:color="#000000"/>
    </style:style>
    <style:style style:name="P95"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name="P98"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99" style:parent-style-name="DefaultParagraphFont" style:family="text">
      <style:text-properties fo:color="#000000"/>
    </style:style>
    <style:style style:name="T100" style:parent-style-name="DefaultParagraphFont" style:family="text">
      <style:text-properties fo:color="#000000"/>
    </style:style>
    <style:style style:name="P101"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02" style:parent-style-name="DefaultParagraphFont" style:family="text">
      <style:text-properties fo:color="#000000"/>
    </style:style>
    <style:style style:name="T103" style:parent-style-name="DefaultParagraphFont" style:family="text">
      <style:text-properties fo:color="#000000"/>
    </style:style>
    <style:style style:name="P104"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05" style:parent-style-name="DefaultParagraphFont" style:family="text">
      <style:text-properties fo:color="#000000"/>
    </style:style>
    <style:style style:name="T106" style:parent-style-name="DefaultParagraphFont" style:family="text">
      <style:text-properties fo:color="#000000"/>
    </style:style>
    <style:style style:name="P107"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08" style:parent-style-name="DefaultParagraphFont" style:family="text">
      <style:text-properties fo:font-weight="bold" style:font-weight-asian="bold" style:font-weight-complex="bold" fo:color="#000000"/>
    </style:style>
    <style:style style:name="T109" style:parent-style-name="DefaultParagraphFont" style:family="text">
      <style:text-properties fo:font-weight="bold" style:font-weight-asian="bold" style:font-weight-complex="bold" fo:color="#000000"/>
    </style:style>
    <style:style style:name="P110"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11" style:parent-style-name="DefaultParagraphFont" style:family="text">
      <style:text-properties fo:font-weight="bold" style:font-weight-asian="bold" style:font-weight-complex="bold" fo:color="#000000"/>
    </style:style>
    <style:style style:name="T112" style:parent-style-name="DefaultParagraphFont" style:family="text">
      <style:text-properties fo:font-weight="bold" style:font-weight-asian="bold" style:font-weight-complex="bold" fo:color="#000000"/>
    </style:style>
    <style:style style:name="P113"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14" style:parent-style-name="DefaultParagraphFont" style:family="text">
      <style:text-properties fo:color="#000000"/>
    </style:style>
    <style:style style:name="T115" style:parent-style-name="DefaultParagraphFont" style:family="text">
      <style:text-properties fo:color="#000000"/>
    </style:style>
    <style:style style:name="P116"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17" style:parent-style-name="DefaultParagraphFont" style:family="text">
      <style:text-properties fo:color="#000000"/>
    </style:style>
    <style:style style:name="T118" style:parent-style-name="DefaultParagraphFont" style:family="text">
      <style:text-properties fo:color="#000000"/>
    </style:style>
    <style:style style:name="P119"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P122"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23" style:parent-style-name="DefaultParagraphFont" style:family="text">
      <style:text-properties fo:font-weight="bold" style:font-weight-asian="bold" style:font-weight-complex="bold" fo:color="#000000"/>
    </style:style>
    <style:style style:name="T124" style:parent-style-name="DefaultParagraphFont" style:family="text">
      <style:text-properties fo:font-weight="bold" style:font-weight-asian="bold" style:font-weight-complex="bold" fo:color="#000000"/>
    </style:style>
    <style:style style:name="P125"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P128"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P131"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P134"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35" style:parent-style-name="DefaultParagraphFont" style:family="text">
      <style:text-properties fo:font-weight="bold" style:font-weight-asian="bold" style:font-weight-complex="bold" fo:color="#000000"/>
    </style:style>
    <style:style style:name="T136" style:parent-style-name="DefaultParagraphFont" style:family="text">
      <style:text-properties fo:font-weight="bold" style:font-weight-asian="bold" style:font-weight-complex="bold" fo:color="#000000"/>
    </style:style>
    <style:style style:name="P137"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38" style:parent-style-name="DefaultParagraphFont" style:family="text">
      <style:text-properties fo:color="#000000"/>
    </style:style>
    <style:style style:name="T139" style:parent-style-name="DefaultParagraphFont" style:family="text">
      <style:text-properties fo:color="#000000"/>
    </style:style>
    <style:style style:name="P140"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P143"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P146"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47" style:parent-style-name="DefaultParagraphFont" style:family="text">
      <style:text-properties fo:color="#000000"/>
    </style:style>
    <style:style style:name="T148" style:parent-style-name="DefaultParagraphFont" style:family="text">
      <style:text-properties fo:color="#000000"/>
    </style:style>
    <style:style style:name="P149"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50" style:parent-style-name="DefaultParagraphFont" style:family="text">
      <style:text-properties fo:font-weight="bold" style:font-weight-asian="bold" style:font-weight-complex="bold" fo:color="#000000"/>
    </style:style>
    <style:style style:name="T151" style:parent-style-name="DefaultParagraphFont" style:family="text">
      <style:text-properties fo:font-weight="bold" style:font-weight-asian="bold" style:font-weight-complex="bold" fo:color="#000000"/>
    </style:style>
    <style:style style:name="P152"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53" style:parent-style-name="DefaultParagraphFont" style:family="text">
      <style:text-properties fo:font-weight="bold" style:font-weight-asian="bold" style:font-weight-complex="bold" fo:color="#000000"/>
    </style:style>
    <style:style style:name="T154" style:parent-style-name="DefaultParagraphFont" style:family="text">
      <style:text-properties fo:font-weight="bold" style:font-weight-asian="bold" style:font-weight-complex="bold" fo:color="#000000"/>
    </style:style>
    <style:style style:name="P155"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56" style:parent-style-name="DefaultParagraphFont" style:family="text">
      <style:text-properties fo:color="#000000"/>
    </style:style>
    <style:style style:name="T157" style:parent-style-name="DefaultParagraphFont" style:family="text">
      <style:text-properties fo:color="#000000"/>
    </style:style>
    <style:style style:name="P158"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59" style:parent-style-name="DefaultParagraphFont" style:family="text">
      <style:text-properties fo:color="#000000"/>
    </style:style>
    <style:style style:name="T160" style:parent-style-name="DefaultParagraphFont" style:family="text">
      <style:text-properties fo:color="#000000"/>
    </style:style>
    <style:style style:name="P161"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62" style:parent-style-name="DefaultParagraphFont" style:family="text">
      <style:text-properties fo:color="#000000"/>
    </style:style>
    <style:style style:name="T163" style:parent-style-name="DefaultParagraphFont" style:family="text">
      <style:text-properties fo:color="#000000"/>
    </style:style>
    <style:style style:name="P164"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65" style:parent-style-name="DefaultParagraphFont" style:family="text">
      <style:text-properties fo:color="#000000"/>
    </style:style>
    <style:style style:name="T166" style:parent-style-name="DefaultParagraphFont" style:family="text">
      <style:text-properties fo:color="#000000"/>
    </style:style>
    <style:style style:name="P167"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68" style:parent-style-name="DefaultParagraphFont" style:family="text">
      <style:text-properties fo:color="#000000"/>
    </style:style>
    <style:style style:name="T169" style:parent-style-name="DefaultParagraphFont" style:family="text">
      <style:text-properties fo:color="#000000"/>
    </style:style>
    <style:style style:name="P170"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71" style:parent-style-name="DefaultParagraphFont" style:family="text">
      <style:text-properties fo:font-weight="bold" style:font-weight-asian="bold" style:font-weight-complex="bold" fo:color="#000000"/>
    </style:style>
    <style:style style:name="T172" style:parent-style-name="DefaultParagraphFont" style:family="text">
      <style:text-properties fo:font-weight="bold" style:font-weight-asian="bold" style:font-weight-complex="bold" fo:color="#000000"/>
    </style:style>
    <style:style style:name="P173"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74" style:parent-style-name="DefaultParagraphFont" style:family="text">
      <style:text-properties fo:font-weight="bold" style:font-weight-asian="bold" style:font-weight-complex="bold" fo:color="#000000"/>
    </style:style>
    <style:style style:name="T175" style:parent-style-name="DefaultParagraphFont" style:family="text">
      <style:text-properties fo:font-weight="bold" style:font-weight-asian="bold" style:font-weight-complex="bold" fo:color="#000000"/>
    </style:style>
    <style:style style:name="P176"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77" style:parent-style-name="DefaultParagraphFont" style:family="text">
      <style:text-properties fo:color="#000000"/>
    </style:style>
    <style:style style:name="T178" style:parent-style-name="DefaultParagraphFont" style:family="text">
      <style:text-properties fo:color="#000000"/>
    </style:style>
    <style:style style:name="P179" style:parent-style-name="Standard" style:family="paragraph">
      <style:paragraph-properties fo:margin-top="0.0416in" fo:line-height="100%" fo:margin-left="0.25in">
        <style:tab-stops>
          <style:tab-stop style:type="right" style:leader-style="dotted" style:leader-text="." style:position="8.3333in"/>
        </style:tab-stops>
      </style:paragraph-properties>
    </style:style>
    <style:style style:name="T180" style:parent-style-name="DefaultParagraphFont" style:family="text">
      <style:text-properties fo:color="#000000"/>
    </style:style>
    <style:style style:name="T181" style:parent-style-name="DefaultParagraphFont" style:family="text">
      <style:text-properties fo:color="#000000"/>
    </style:style>
    <style:style style:name="P182" style:parent-style-name="Standard" style:family="paragraph">
      <style:paragraph-properties fo:margin-top="0.0416in" fo:line-height="100%" fo:margin-left="0.5in">
        <style:tab-stops>
          <style:tab-stop style:type="right" style:leader-style="dotted" style:leader-text="." style:position="8.3333in"/>
        </style:tab-stops>
      </style:paragraph-properties>
    </style:style>
    <style:style style:name="T183" style:parent-style-name="DefaultParagraphFont" style:family="text">
      <style:text-properties fo:color="#000000"/>
    </style:style>
    <style:style style:name="T184" style:parent-style-name="DefaultParagraphFont" style:family="text">
      <style:text-properties fo:color="#000000"/>
    </style:style>
    <style:style style:name="P185" style:parent-style-name="Standard" style:family="paragraph">
      <style:paragraph-properties fo:margin-top="0.0416in" fo:line-height="100%" fo:margin-left="0.5in">
        <style:tab-stops>
          <style:tab-stop style:type="right" style:leader-style="dotted" style:leader-text="." style:position="8.3333in"/>
        </style:tab-stops>
      </style:paragraph-properties>
    </style:style>
    <style:style style:name="T186" style:parent-style-name="DefaultParagraphFont" style:family="text">
      <style:text-properties fo:color="#000000"/>
    </style:style>
    <style:style style:name="T187" style:parent-style-name="DefaultParagraphFont" style:family="text">
      <style:text-properties fo:color="#000000"/>
    </style:style>
    <style:style style:name="P188" style:parent-style-name="Standard" style:family="paragraph">
      <style:paragraph-properties fo:margin-top="0.0416in" fo:line-height="100%" fo:margin-left="0.5in">
        <style:tab-stops>
          <style:tab-stop style:type="right" style:leader-style="dotted" style:leader-text="." style:position="8.3333in"/>
        </style:tab-stops>
      </style:paragraph-properties>
    </style:style>
    <style:style style:name="T189" style:parent-style-name="DefaultParagraphFont" style:family="text">
      <style:text-properties fo:color="#000000"/>
    </style:style>
    <style:style style:name="T190" style:parent-style-name="DefaultParagraphFont" style:family="text">
      <style:text-properties fo:color="#000000"/>
    </style:style>
    <style:style style:name="P191" style:parent-style-name="Standard" style:family="paragraph">
      <style:paragraph-properties fo:margin-top="0.0416in" fo:line-height="100%" fo:margin-left="0.5in">
        <style:tab-stops>
          <style:tab-stop style:type="right" style:leader-style="dotted" style:leader-text="." style:position="8.3333in"/>
        </style:tab-stops>
      </style:paragraph-properties>
    </style:style>
    <style:style style:name="T192" style:parent-style-name="DefaultParagraphFont" style:family="text">
      <style:text-properties fo:color="#000000"/>
    </style:style>
    <style:style style:name="T193" style:parent-style-name="DefaultParagraphFont" style:family="text">
      <style:text-properties fo:color="#000000"/>
    </style:style>
    <style:style style:name="P194"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95" style:parent-style-name="DefaultParagraphFont" style:family="text">
      <style:text-properties fo:font-weight="bold" style:font-weight-asian="bold" style:font-weight-complex="bold" fo:color="#000000"/>
    </style:style>
    <style:style style:name="T196" style:parent-style-name="DefaultParagraphFont" style:family="text">
      <style:text-properties fo:font-weight="bold" style:font-weight-asian="bold" style:font-weight-complex="bold" fo:color="#000000"/>
    </style:style>
    <style:style style:name="P197"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198" style:parent-style-name="DefaultParagraphFont" style:family="text">
      <style:text-properties fo:font-weight="bold" style:font-weight-asian="bold" style:font-weight-complex="bold" fo:color="#000000"/>
    </style:style>
    <style:style style:name="T199" style:parent-style-name="DefaultParagraphFont" style:family="text">
      <style:text-properties fo:font-weight="bold" style:font-weight-asian="bold" style:font-weight-complex="bold" fo:color="#000000"/>
    </style:style>
    <style:style style:name="P200" style:parent-style-name="Standard" style:family="paragraph">
      <style:paragraph-properties fo:margin-top="0.0416in" fo:line-height="100%">
        <style:tab-stops>
          <style:tab-stop style:type="right" style:leader-style="dotted" style:leader-text="." style:position="8.3333in"/>
        </style:tab-stops>
      </style:paragraph-properties>
    </style:style>
    <style:style style:name="T201" style:parent-style-name="DefaultParagraphFont" style:family="text">
      <style:text-properties fo:font-weight="bold" style:font-weight-asian="bold" style:font-weight-complex="bold" fo:color="#000000"/>
    </style:style>
    <style:style style:name="T202" style:parent-style-name="DefaultParagraphFont" style:family="text">
      <style:text-properties fo:font-weight="bold" style:font-weight-asian="bold" style:font-weight-complex="bold" fo:color="#000000"/>
    </style:style>
    <style:style style:name="P203" style:parent-style-name="Heading1" style:family="paragraph">
      <style:paragraph-properties fo:break-before="page"/>
    </style:style>
    <style:style style:name="P204" style:parent-style-name="Standard" style:family="paragraph">
      <style:paragraph-properties fo:widows="2" fo:orphans="2"/>
    </style:style>
    <style:style style:name="P205" style:parent-style-name="Standard" style:family="paragraph">
      <style:paragraph-properties fo:widows="2" fo:orphans="2"/>
    </style:style>
    <style:style style:name="T206" style:parent-style-name="DefaultParagraphFont" style:family="text">
      <style:text-properties fo:font-weight="bold" style:font-weight-asian="bold" style:font-weight-complex="bold" fo:font-style="italic" style:font-style-asian="italic" style:font-style-complex="italic"/>
    </style:style>
    <style:style style:name="P207" style:parent-style-name="Standard" style:family="paragraph">
      <style:paragraph-properties fo:widows="2" fo:orphans="2"/>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style="italic" style:font-style-asian="italic" style:font-style-complex="italic"/>
    </style:style>
    <style:style style:name="P210" style:parent-style-name="Standard" style:family="paragraph">
      <style:paragraph-properties fo:widows="2" fo:orphans="2"/>
    </style:style>
    <style:style style:name="P211" style:parent-style-name="Standard" style:family="paragraph">
      <style:paragraph-properties fo:widows="2" fo:orphans="2"/>
    </style:style>
    <style:style style:name="T212" style:parent-style-name="DefaultParagraphFont" style:family="text">
      <style:text-properties fo:color="#1155CC" style:text-underline-type="single" style:text-underline-style="solid" style:text-underline-width="auto" style:text-underline-mode="continuous"/>
    </style:style>
    <style:style style:name="T213" style:parent-style-name="DefaultParagraphFont" style:family="text">
      <style:text-properties fo:color="#1155CC" style:text-underline-type="single" style:text-underline-style="solid" style:text-underline-width="auto" style:text-underline-mode="continuous"/>
    </style:style>
    <style:style style:name="T214" style:parent-style-name="DefaultParagraphFont" style:family="text">
      <style:text-properties fo:color="#1155CC" style:text-underline-type="single" style:text-underline-style="solid" style:text-underline-width="auto" style:text-underline-mode="continuous"/>
    </style:style>
    <style:style style:name="T215" style:parent-style-name="DefaultParagraphFont" style:family="text">
      <style:text-properties fo:font-weight="bold" style:font-weight-asian="bold" style:font-weight-complex="bold" fo:font-style="italic" style:font-style-asian="italic" style:font-style-complex="italic"/>
    </style:style>
    <style:style style:name="P216" style:parent-style-name="Standard" style:family="paragraph">
      <style:paragraph-properties fo:widows="2" fo:orphans="2"/>
    </style:style>
    <style:style style:name="T217" style:parent-style-name="DefaultParagraphFont" style:family="text">
      <style:text-properties fo:font-style="italic" style:font-style-asian="italic" style:font-style-complex="italic"/>
    </style:style>
    <style:style style:name="P218" style:parent-style-name="Standard" style:family="paragraph">
      <style:paragraph-properties fo:widows="2" fo:orphans="2"/>
    </style:style>
    <style:style style:name="T219" style:parent-style-name="DefaultParagraphFont" style:family="text">
      <style:text-properties fo:color="#1155CC" style:text-underline-type="single" style:text-underline-style="solid" style:text-underline-width="auto" style:text-underline-mode="continuous"/>
    </style:style>
    <style:style style:name="P220" style:parent-style-name="Standard" style:family="paragraph">
      <style:paragraph-properties fo:widows="2" fo:orphans="2"/>
    </style:style>
    <style:style style:name="P221" style:parent-style-name="Standard" style:family="paragraph">
      <style:paragraph-properties fo:widows="2" fo:orphans="2"/>
    </style:style>
    <style:style style:name="P222" style:parent-style-name="Standard" style:family="paragraph">
      <style:paragraph-properties fo:widows="2" fo:orphans="2"/>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style="italic" style:font-style-asian="italic" style:font-style-complex="italic"/>
    </style:style>
    <style:style style:name="T225" style:parent-style-name="DefaultParagraphFont" style:family="text">
      <style:text-properties fo:font-style="italic" style:font-style-asian="italic" style:font-style-complex="italic" fo:color="#1155CC" style:text-underline-type="single" style:text-underline-style="solid" style:text-underline-width="auto" style:text-underline-mode="continuous"/>
    </style:style>
    <style:style style:name="T226" style:parent-style-name="DefaultParagraphFont" style:family="text">
      <style:text-properties fo:font-style="italic" style:font-style-asian="italic" style:font-style-complex="italic"/>
    </style:style>
    <style:style style:name="T227" style:parent-style-name="DefaultParagraphFont" style:family="text">
      <style:text-properties fo:font-weight="bold" style:font-weight-asian="bold" style:font-weight-complex="bold" fo:font-style="italic" style:font-style-asian="italic" style:font-style-complex="italic"/>
    </style:style>
    <style:style style:name="P228" style:parent-style-name="Standard" style:family="paragraph">
      <style:paragraph-properties fo:widows="2" fo:orphans="2"/>
    </style:style>
    <style:style style:name="T229" style:parent-style-name="DefaultParagraphFont" style:family="text">
      <style:text-properties fo:font-weight="bold" style:font-weight-asian="bold" style:font-weight-complex="bold"/>
    </style:style>
    <style:style style:name="P230" style:parent-style-name="Standard" style:family="paragraph">
      <style:paragraph-properties fo:widows="2" fo:orphans="2"/>
    </style:style>
    <style:style style:name="T231" style:parent-style-name="DefaultParagraphFont" style:family="text">
      <style:text-properties fo:font-weight="bold" style:font-weight-asian="bold" style:font-weight-complex="bold"/>
    </style:style>
    <style:style style:name="P232" style:parent-style-name="Standard" style:family="paragraph">
      <style:paragraph-properties fo:widows="2" fo:orphans="2"/>
    </style:style>
    <style:style style:name="T233" style:parent-style-name="DefaultParagraphFont" style:family="text">
      <style:text-properties fo:font-weight="bold" style:font-weight-asian="bold" style:font-weight-complex="bold"/>
    </style:style>
    <style:style style:name="P234" style:parent-style-name="Standard" style:family="paragraph">
      <style:paragraph-properties fo:widows="2" fo:orphans="2"/>
    </style:style>
    <style:style style:name="T235" style:parent-style-name="DefaultParagraphFont" style:family="text">
      <style:text-properties fo:font-weight="bold" style:font-weight-asian="bold" style:font-weight-complex="bold"/>
    </style:style>
    <style:style style:name="P236" style:parent-style-name="Standard" style:family="paragraph">
      <style:paragraph-properties fo:widows="2" fo:orphans="2"/>
    </style:style>
    <style:style style:name="T237" style:parent-style-name="DefaultParagraphFont" style:family="text">
      <style:text-properties fo:font-weight="bold" style:font-weight-asian="bold" style:font-weight-complex="bold"/>
    </style:style>
    <style:style style:name="P238" style:parent-style-name="Heading1" style:family="paragraph">
      <style:paragraph-properties fo:break-before="page"/>
    </style:style>
    <style:style style:name="T239" style:parent-style-name="DefaultParagraphFont" style:family="text">
      <style:text-properties fo:font-style="italic" style:font-style-asian="italic" style:font-style-complex="italic"/>
    </style:style>
    <style:style style:name="P240" style:parent-style-name="Standard" style:family="paragraph">
      <style:paragraph-properties fo:widows="2" fo:orphans="2"/>
    </style:style>
    <style:style style:name="P241" style:parent-style-name="Standard" style:family="paragraph">
      <style:paragraph-properties fo:widows="2" fo:orphans="2"/>
    </style:style>
    <style:style style:name="T242" style:parent-style-name="DefaultParagraphFont" style:family="text">
      <style:text-properties fo:color="#1155CC" style:text-underline-type="single" style:text-underline-style="solid" style:text-underline-width="auto" style:text-underline-mode="continuous"/>
    </style:style>
    <style:style style:name="P243" style:parent-style-name="Standard" style:family="paragraph">
      <style:paragraph-properties fo:widows="2" fo:orphans="2"/>
    </style:style>
    <style:style style:name="T244" style:parent-style-name="DefaultParagraphFont" style:family="text">
      <style:text-properties fo:color="#1155CC" style:text-underline-type="single" style:text-underline-style="solid" style:text-underline-width="auto" style:text-underline-mode="continuous"/>
    </style:style>
    <style:style style:name="T245" style:parent-style-name="DefaultParagraphFont" style:family="text">
      <style:text-properties fo:color="#1155CC" style:text-underline-type="single" style:text-underline-style="solid" style:text-underline-width="auto" style:text-underline-mode="continuous"/>
    </style:style>
    <style:style style:name="P246" style:parent-style-name="Standard" style:family="paragraph">
      <style:paragraph-properties fo:widows="2" fo:orphans="2"/>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color="#1155CC" style:text-underline-type="single" style:text-underline-style="solid" style:text-underline-width="auto" style:text-underline-mode="continuous"/>
    </style:style>
    <style:style style:name="P249" style:parent-style-name="Standard" style:family="paragraph">
      <style:paragraph-properties fo:widows="2" fo:orphans="2"/>
    </style:style>
    <style:style style:name="P250" style:parent-style-name="Standard" style:family="paragraph">
      <style:paragraph-properties fo:widows="2" fo:orphans="2"/>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style="italic" style:font-style-asian="italic" style:font-style-complex="italic"/>
    </style:style>
    <style:style style:name="P254" style:parent-style-name="Standard" style:family="paragraph">
      <style:paragraph-properties fo:widows="2" fo:orphans="2"/>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style="italic" style:font-style-asian="italic" style:font-style-complex="italic"/>
    </style:style>
    <style:style style:name="T257" style:parent-style-name="DefaultParagraphFont" style:family="text">
      <style:text-properties fo:color="#1155CC" style:text-underline-type="single" style:text-underline-style="solid" style:text-underline-width="auto" style:text-underline-mode="continuous"/>
    </style:style>
    <style:style style:name="P258" style:parent-style-name="Heading1" style:family="paragraph">
      <style:paragraph-properties fo:break-before="page"/>
    </style:style>
    <style:style style:name="P259" style:parent-style-name="Standard" style:family="paragraph"/>
    <style:style style:name="T260" style:parent-style-name="DefaultParagraphFont" style:family="text">
      <style:text-properties fo:color="#1155CC" style:text-underline-type="single" style:text-underline-style="solid" style:text-underline-width="auto" style:text-underline-mode="continuous"/>
    </style:style>
    <style:style style:name="P261" style:parent-style-name="Standard" style:family="paragraph"/>
    <style:style style:name="T262" style:parent-style-name="DefaultParagraphFont" style:family="text">
      <style:text-properties fo:color="#1155CC" style:text-underline-type="single" style:text-underline-style="solid" style:text-underline-width="auto" style:text-underline-mode="continuous"/>
    </style:style>
    <style:style style:name="T263" style:parent-style-name="DefaultParagraphFont" style:family="text">
      <style:text-properties fo:color="#1155CC" style:text-underline-type="single" style:text-underline-style="solid" style:text-underline-width="auto" style:text-underline-mode="continuous"/>
    </style:style>
    <style:style style:name="T264" style:parent-style-name="DefaultParagraphFont" style:family="text">
      <style:text-properties fo:color="#1155CC" style:text-underline-type="single" style:text-underline-style="solid" style:text-underline-width="auto" style:text-underline-mode="continuous"/>
    </style:style>
    <style:style style:name="T265" style:parent-style-name="DefaultParagraphFont" style:family="text">
      <style:text-properties fo:font-style="italic" style:font-style-asian="italic" style:font-style-complex="italic"/>
    </style:style>
    <style:style style:name="P266" style:parent-style-name="Heading1" style:family="paragraph">
      <style:paragraph-properties fo:break-before="page"/>
    </style:style>
    <style:style style:name="T267" style:parent-style-name="DefaultParagraphFont" style:family="text">
      <style:text-properties fo:color="#1155CC" style:text-underline-type="single" style:text-underline-style="solid" style:text-underline-width="auto" style:text-underline-mode="continuous"/>
    </style:style>
    <style:style style:name="T268" style:parent-style-name="DefaultParagraphFont" style:family="text">
      <style:text-properties fo:color="#1155CC" style:text-underline-type="single" style:text-underline-style="solid" style:text-underline-width="auto" style:text-underline-mode="continuous"/>
    </style:style>
    <style:style style:name="T269" style:parent-style-name="DefaultParagraphFont" style:family="text">
      <style:text-properties fo:color="#1155CC" style:text-underline-type="single" style:text-underline-style="solid" style:text-underline-width="auto" style:text-underline-mode="continuous"/>
    </style:style>
    <style:style style:name="T270" style:parent-style-name="DefaultParagraphFont" style:family="text">
      <style:text-properties fo:font-style="italic" style:font-style-asian="italic" style:font-style-complex="italic"/>
    </style:style>
    <style:style style:name="T271" style:parent-style-name="DefaultParagraphFont" style:family="text">
      <style:text-properties fo:font-style="italic" style:font-style-asian="italic" style:font-style-complex="italic" fo:color="#1155CC" style:text-underline-type="single" style:text-underline-style="solid" style:text-underline-width="auto" style:text-underline-mode="continuous"/>
    </style:style>
    <style:style style:name="T272" style:parent-style-name="DefaultParagraphFont" style:family="text">
      <style:text-properties fo:font-style="italic" style:font-style-asian="italic" style:font-style-complex="italic"/>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style="italic" style:font-style-asian="italic" style:font-style-complex="italic"/>
    </style:style>
    <style:style style:name="P275" style:parent-style-name="Heading1" style:family="paragraph">
      <style:paragraph-properties fo:break-before="page"/>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style="italic" style:font-style-asian="italic" style:font-style-complex="italic"/>
    </style:style>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weight="bold" style:font-weight-asian="bold" style:font-weight-complex="bold"/>
    </style:style>
    <style:style style:name="P280" style:parent-style-name="Standard" style:family="paragraph"/>
    <style:style style:name="T281" style:parent-style-name="DefaultParagraphFont" style:family="text">
      <style:text-properties fo:font-style="italic" style:font-style-asian="italic" style:font-style-complex="italic"/>
    </style:style>
    <style:style style:name="P282" style:parent-style-name="Standard" style:family="paragraph"/>
    <style:style style:name="T283" style:parent-style-name="DefaultParagraphFont" style:family="text">
      <style:text-properties fo:font-style="italic" style:font-style-asian="italic" style:font-style-complex="italic"/>
    </style:style>
    <style:style style:name="P284" style:parent-style-name="Standard" style:family="paragraph"/>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fo:font-style="italic" style:font-style-asian="italic" style:font-style-complex="italic"/>
    </style:style>
    <style:style style:name="T287" style:parent-style-name="DefaultParagraphFont" style:family="text">
      <style:text-properties fo:font-style="italic" style:font-style-asian="italic" style:font-style-complex="italic"/>
    </style:style>
    <style:style style:name="P288" style:parent-style-name="Standard" style:family="paragraph">
      <style:text-properties fo:font-style="italic" style:font-style-asian="italic" style:font-style-complex="italic"/>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fo:font-weight="bold" style:font-weight-asian="bold" style:font-weight-complex="bold"/>
    </style:style>
    <style:style style:name="P291" style:parent-style-name="Heading1" style:family="paragraph">
      <style:paragraph-properties fo:break-before="page"/>
    </style:style>
    <style:style style:name="P292" style:parent-style-name="Standard" style:family="paragraph">
      <style:text-properties fo:font-size="11pt" style:font-size-asian="11pt" style:font-size-complex="11pt"/>
    </style:style>
    <style:style style:name="T293" style:parent-style-name="DefaultParagraphFont" style:family="text">
      <style:text-properties fo:font-weight="bold" style:font-weight-asian="bold" style:font-weight-complex="bold" fo:font-size="11pt" style:font-size-asian="11pt" style:font-size-complex="11pt"/>
    </style:style>
    <style:style style:name="T294" style:parent-style-name="DefaultParagraphFont" style:family="text">
      <style:text-properties fo:font-size="11pt" style:font-size-asian="11pt" style:font-size-complex="11pt"/>
    </style:style>
    <style:style style:name="T295" style:parent-style-name="DefaultParagraphFont" style:family="text">
      <style:text-properties fo:font-style="italic" style:font-style-asian="italic" style:font-style-complex="italic" fo:font-size="11pt" style:font-size-asian="11pt" style:font-size-complex="11pt"/>
    </style:style>
    <style:style style:name="T296" style:parent-style-name="DefaultParagraphFont" style:family="text">
      <style:text-properties fo:font-size="11pt" style:font-size-asian="11pt" style:font-size-complex="11pt"/>
    </style:style>
    <style:style style:name="T297" style:parent-style-name="DefaultParagraphFont" style:family="text">
      <style:text-properties fo:font-style="italic" style:font-style-asian="italic" style:font-style-complex="italic" fo:font-size="11pt" style:font-size-asian="11pt" style:font-size-complex="11pt"/>
    </style:style>
    <style:style style:name="T298" style:parent-style-name="DefaultParagraphFont" style:family="text">
      <style:text-properties fo:font-size="11pt" style:font-size-asian="11pt" style:font-size-complex="11pt"/>
    </style:style>
    <style:style style:name="P299" style:parent-style-name="Standard" style:family="paragraph">
      <style:text-properties fo:font-size="11pt" style:font-size-asian="11pt" style:font-size-complex="11pt"/>
    </style:style>
    <style:style style:name="T300" style:parent-style-name="DefaultParagraphFont" style:family="text">
      <style:text-properties fo:font-size="11pt" style:font-size-asian="11pt" style:font-size-complex="11pt"/>
    </style:style>
    <style:style style:name="P301" style:parent-style-name="Standard" style:family="paragraph">
      <style:text-properties fo:font-size="11pt" style:font-size-asian="11pt" style:font-size-complex="11pt"/>
    </style:style>
    <style:style style:name="T302" style:parent-style-name="DefaultParagraphFont" style:family="text">
      <style:text-properties fo:font-size="11pt" style:font-size-asian="11pt" style:font-size-complex="11pt"/>
    </style:style>
    <style:style style:name="P303" style:parent-style-name="Standard" style:family="paragraph">
      <style:text-properties fo:font-size="11pt" style:font-size-asian="11pt" style:font-size-complex="11pt"/>
    </style:style>
    <style:style style:name="T304" style:parent-style-name="DefaultParagraphFont" style:family="text">
      <style:text-properties fo:font-size="11pt" style:font-size-asian="11pt" style:font-size-complex="11pt"/>
    </style:style>
    <style:style style:name="P305" style:parent-style-name="Standard" style:family="paragraph">
      <style:text-properties fo:font-size="11pt" style:font-size-asian="11pt" style:font-size-complex="11pt"/>
    </style:style>
    <style:style style:name="T306" style:parent-style-name="DefaultParagraphFont" style:family="text">
      <style:text-properties fo:font-size="11pt" style:font-size-asian="11pt" style:font-size-complex="11pt"/>
    </style:style>
    <style:style style:name="P307" style:parent-style-name="Standard" style:family="paragraph">
      <style:text-properties fo:font-size="11pt" style:font-size-asian="11pt" style:font-size-complex="11pt"/>
    </style:style>
    <style:style style:name="T308" style:parent-style-name="DefaultParagraphFont" style:family="text">
      <style:text-properties fo:font-size="11pt" style:font-size-asian="11pt" style:font-size-complex="11pt"/>
    </style:style>
    <style:style style:name="T309" style:parent-style-name="DefaultParagraphFont" style:family="text">
      <style:text-properties fo:font-size="11pt" style:font-size-asian="11pt" style:font-size-complex="11pt"/>
    </style:style>
    <style:style style:name="T310" style:parent-style-name="DefaultParagraphFont" style:family="text">
      <style:text-properties fo:font-size="11pt" style:font-size-asian="11pt" style:font-size-complex="11pt"/>
    </style:style>
    <style:style style:name="P311" style:parent-style-name="Standard" style:family="paragraph">
      <style:text-properties fo:font-size="11pt" style:font-size-asian="11pt" style:font-size-complex="11pt"/>
    </style:style>
    <style:style style:name="T312" style:parent-style-name="DefaultParagraphFont" style:family="text">
      <style:text-properties fo:font-size="11pt" style:font-size-asian="11pt" style:font-size-complex="11pt"/>
    </style:style>
    <style:style style:name="P313" style:parent-style-name="Standard" style:family="paragraph">
      <style:text-properties fo:font-size="11pt" style:font-size-asian="11pt" style:font-size-complex="11pt"/>
    </style:style>
    <style:style style:name="P314" style:parent-style-name="Heading1" style:family="paragraph">
      <style:paragraph-properties fo:break-before="page"/>
    </style:style>
    <style:style style:name="T315" style:parent-style-name="DefaultParagraphFont" style:family="text">
      <style:text-properties fo:font-weight="bold" style:font-weight-asian="bold" style:font-weight-complex="bold" fo:font-style="italic" style:font-style-asian="italic" style:font-style-complex="italic"/>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fo:font-style="italic" style:font-style-asian="italic" style:font-style-complex="italic"/>
    </style:style>
    <style:style style:name="P318" style:parent-style-name="Standard" style:family="paragraph">
      <style:text-properties fo:font-size="11pt" style:font-size-asian="11pt" style:font-size-complex="11pt"/>
    </style:style>
    <style:style style:name="P319" style:parent-style-name="Heading1" style:family="paragraph">
      <style:paragraph-properties fo:break-before="page"/>
    </style:style>
    <style:style style:name="P320" style:parent-style-name="Heading1" style:family="paragraph">
      <style:paragraph-properties fo:break-before="page"/>
    </style:style>
    <style:style style:name="P321" style:parent-style-name="Standard" style:family="paragraph">
      <style:text-properties fo:font-size="11pt" style:font-size-asian="11pt" style:font-size-complex="11pt"/>
    </style:style>
    <style:style style:name="P322" style:parent-style-name="Heading1" style:family="paragraph">
      <style:paragraph-properties fo:break-before="page"/>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font-style="italic" style:font-style-asian="italic" style:font-style-complex="italic"/>
    </style:style>
    <style:style style:name="T327" style:parent-style-name="DefaultParagraphFont" style:family="text">
      <style:text-properties fo:font-style="italic" style:font-style-asian="italic" style:font-style-complex="italic"/>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P335" style:parent-style-name="Standard" style:family="paragraph">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T339" style:parent-style-name="DefaultParagraphFont" style:family="text">
      <style:text-properties fo:font-style="italic" style:font-style-asian="italic" style:font-style-complex="italic"/>
    </style:style>
    <style:style style:name="T340" style:parent-style-name="DefaultParagraphFont" style:family="text">
      <style:text-properties fo:font-style="italic" style:font-style-asian="italic" style:font-style-complex="italic"/>
    </style:style>
    <style:style style:name="T341" style:parent-style-name="DefaultParagraphFont" style:family="text">
      <style:text-properties fo:font-style="italic" style:font-style-asian="italic" style:font-style-complex="italic"/>
    </style:style>
    <style:style style:name="P342" style:parent-style-name="Standard" style:family="paragraph">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style="italic" style:font-style-asian="italic" style:font-style-complex="italic"/>
    </style:style>
    <style:style style:name="T345" style:parent-style-name="DefaultParagraphFont" style:family="text">
      <style:text-properties fo:font-style="italic" style:font-style-asian="italic" style:font-style-complex="italic"/>
    </style:style>
    <style:style style:name="T346" style:parent-style-name="DefaultParagraphFont" style:family="text">
      <style:text-properties fo:font-style="italic" style:font-style-asian="italic" style:font-style-complex="italic"/>
    </style:style>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fo:font-style="italic" style:font-style-asian="italic" style:font-style-complex="italic"/>
    </style:style>
    <style:style style:name="T349" style:parent-style-name="DefaultParagraphFont" style:family="text">
      <style:text-properties fo:font-style="italic" style:font-style-asian="italic" style:font-style-complex="italic"/>
    </style:style>
    <style:style style:name="T350" style:parent-style-name="DefaultParagraphFont" style:family="text">
      <style:text-properties fo:font-style="italic" style:font-style-asian="italic" style:font-style-complex="italic"/>
    </style:style>
    <style:style style:name="T351" style:parent-style-name="DefaultParagraphFont" style:family="text">
      <style:text-properties fo:font-style="italic" style:font-style-asian="italic" style:font-style-complex="italic"/>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fo:font-style="italic" style:font-style-asian="italic" style:font-style-complex="italic"/>
    </style:style>
    <style:style style:name="T354" style:parent-style-name="DefaultParagraphFont" style:family="text">
      <style:text-properties fo:font-style="italic" style:font-style-asian="italic" style:font-style-complex="italic"/>
    </style:style>
    <style:style style:name="T355" style:parent-style-name="DefaultParagraphFont" style:family="text">
      <style:text-properties fo:font-style="italic" style:font-style-asian="italic" style:font-style-complex="italic"/>
    </style:style>
    <style:style style:name="P356" style:parent-style-name="Heading1" style:family="paragraph">
      <style:paragraph-properties fo:break-before="page"/>
    </style:style>
    <style:style style:name="P357" style:parent-style-name="Heading1" style:family="paragraph">
      <style:paragraph-properties fo:break-before="page"/>
    </style:style>
    <style:style style:name="T358" style:parent-style-name="DefaultParagraphFont" style:family="text">
      <style:text-properties fo:color="#1155CC" style:text-underline-type="single" style:text-underline-style="solid" style:text-underline-width="auto" style:text-underline-mode="continuous"/>
    </style:style>
    <style:style style:name="T359" style:parent-style-name="DefaultParagraphFont" style:family="text">
      <style:text-properties fo:color="#1155CC" style:text-underline-type="single" style:text-underline-style="solid" style:text-underline-width="auto" style:text-underline-mode="continuous"/>
    </style:style>
    <style:style style:name="T360" style:parent-style-name="DefaultParagraphFont" style:family="text">
      <style:text-properties fo:color="#1155CC" style:text-underline-type="single" style:text-underline-style="solid" style:text-underline-width="auto" style:text-underline-mode="continuous"/>
    </style:style>
    <style:style style:name="T361" style:parent-style-name="DefaultParagraphFont" style:family="text">
      <style:text-properties fo:color="#1155CC" style:text-underline-type="single" style:text-underline-style="solid" style:text-underline-width="auto" style:text-underline-mode="continuous"/>
    </style:style>
    <style:style style:name="T362" style:parent-style-name="DefaultParagraphFont" style:family="text">
      <style:text-properties fo:color="#24292E" fo:background-color="#FFFFFF"/>
    </style:style>
    <style:style style:name="T363" style:parent-style-name="DefaultParagraphFont" style:family="text">
      <style:text-properties fo:font-style="italic" style:font-style-asian="italic" style:font-style-complex="italic" fo:color="#24292E" fo:background-color="#FFFFFF"/>
    </style:style>
    <style:style style:name="T364" style:parent-style-name="DefaultParagraphFont" style:family="text">
      <style:text-properties fo:color="#24292E" fo:background-color="#FFFFFF"/>
    </style:style>
    <style:style style:name="P365" style:parent-style-name="Standard" style:family="paragraph">
      <style:text-properties fo:color="#24292E" fo:background-color="#FFFFFF"/>
    </style:style>
    <style:style style:name="T366" style:parent-style-name="DefaultParagraphFont" style:family="text">
      <style:text-properties fo:color="#24292E" fo:background-color="#FFFFFF"/>
    </style:style>
    <style:style style:name="T367" style:parent-style-name="DefaultParagraphFont" style:family="text">
      <style:text-properties fo:color="#24292E" fo:background-color="#FFFFFF"/>
    </style:style>
    <style:style style:name="P368" style:parent-style-name="Standard" style:family="paragraph">
      <style:text-properties fo:color="#24292E" fo:background-color="#FFFFFF"/>
    </style:style>
    <style:style style:name="T369" style:parent-style-name="DefaultParagraphFont" style:family="text">
      <style:text-properties fo:color="#24292E" fo:background-color="#FFFFFF"/>
    </style:style>
    <style:style style:name="P370" style:parent-style-name="Standard" style:family="paragraph">
      <style:text-properties fo:color="#24292E" fo:background-color="#FFFFFF"/>
    </style:style>
    <style:style style:name="T371" style:parent-style-name="DefaultParagraphFont" style:family="text">
      <style:text-properties fo:color="#24292E" fo:background-color="#FFFFFF"/>
    </style:style>
    <style:style style:name="T372" style:parent-style-name="DefaultParagraphFont" style:family="text">
      <style:text-properties fo:color="#24292E" fo:background-color="#FFFFFF"/>
    </style:style>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T380" style:parent-style-name="DefaultParagraphFont" style:family="text">
      <style:text-properties fo:color="#1155CC" style:text-underline-type="single" style:text-underline-style="solid" style:text-underline-width="auto" style:text-underline-mode="continuous"/>
    </style:style>
    <style:style style:name="T381" style:parent-style-name="DefaultParagraphFont" style:family="text">
      <style:text-properties fo:color="#1155CC" style:text-underline-type="single" style:text-underline-style="solid" style:text-underline-width="auto" style:text-underline-mode="continuous"/>
    </style:style>
    <style:style style:name="T382" style:parent-style-name="DefaultParagraphFont" style:family="text">
      <style:text-properties fo:color="#1155CC" style:text-underline-type="single" style:text-underline-style="solid" style:text-underline-width="auto" style:text-underline-mode="continuous"/>
    </style:style>
    <style:style style:name="T383" style:parent-style-name="DefaultParagraphFont" style:family="text">
      <style:text-properties fo:color="#1155CC" style:text-underline-type="single" style:text-underline-style="solid" style:text-underline-width="auto" style:text-underline-mode="continuous"/>
    </style:style>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Heading1" style:family="paragraph">
      <style:paragraph-properties fo:break-before="page"/>
    </style:style>
    <style:style style:name="P393" style:parent-style-name="Heading1" style:family="paragraph">
      <style:paragraph-properties fo:break-before="page"/>
    </style:style>
    <style:style style:name="T394" style:parent-style-name="DefaultParagraphFont" style:family="text">
      <style:text-properties fo:color="#0000EE" style:text-underline-type="single" style:text-underline-style="solid" style:text-underline-width="auto" style:text-underline-mode="continuous"/>
    </style:style>
    <style:style style:name="T395" style:parent-style-name="DefaultParagraphFont" style:family="text">
      <style:text-properties fo:color="#0000EE" style:text-underline-type="single" style:text-underline-style="solid" style:text-underline-width="auto" style:text-underline-mode="continuous"/>
    </style:style>
    <style:style style:name="T396" style:parent-style-name="DefaultParagraphFont" style:family="text">
      <style:text-properties fo:color="#0000EE" style:text-underline-type="single" style:text-underline-style="solid" style:text-underline-width="auto" style:text-underline-mode="continuous"/>
    </style:style>
    <style:style style:name="T397" style:parent-style-name="DefaultParagraphFont" style:family="text">
      <style:text-properties fo:color="#0000EE" style:text-underline-type="single" style:text-underline-style="solid" style:text-underline-width="auto" style:text-underline-mode="continuous"/>
    </style:style>
    <style:style style:name="T398" style:parent-style-name="DefaultParagraphFont" style:family="text">
      <style:text-properties fo:font-style="italic" style:font-style-asian="italic" style:font-style-complex="italic"/>
    </style:style>
    <style:style style:name="P399" style:parent-style-name="Heading1" style:family="paragraph">
      <style:paragraph-properties fo:break-before="page"/>
    </style:style>
    <style:style style:name="P400" style:parent-style-name="Heading1" style:family="paragraph">
      <style:paragraph-properties fo:break-before="page"/>
    </style:style>
    <style:style style:name="P401" style:parent-style-name="Standard" style:family="paragraph"/>
    <style:style style:name="T402" style:parent-style-name="DefaultParagraphFont" style:family="text">
      <style:text-properties fo:color="#1155CC" style:text-underline-type="single" style:text-underline-style="solid" style:text-underline-width="auto" style:text-underline-mode="continuous"/>
    </style:style>
    <style:style style:name="P403" style:parent-style-name="Standard" style:family="paragraph"/>
    <style:style style:name="T404" style:parent-style-name="DefaultParagraphFont" style:family="text">
      <style:text-properties fo:color="#1155CC" style:text-underline-type="single" style:text-underline-style="solid" style:text-underline-width="auto" style:text-underline-mode="continuous"/>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T407" style:parent-style-name="DefaultParagraphFont" style:family="text">
      <style:text-properties fo:font-weight="bold" style:font-weight-asian="bold" style:font-weight-complex="bold"/>
    </style:style>
    <style:style style:name="T408" style:parent-style-name="DefaultParagraphFont" style:family="text">
      <style:text-properties fo:font-style="italic" style:font-style-asian="italic" style:font-style-complex="italic"/>
    </style:style>
    <style:style style:name="T409" style:parent-style-name="DefaultParagraphFont" style:family="text">
      <style:text-properties fo:color="#1155CC" style:text-underline-type="single" style:text-underline-style="solid" style:text-underline-width="auto" style:text-underline-mode="continuous"/>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fo:color="#1155CC" style:text-underline-type="single" style:text-underline-style="solid" style:text-underline-width="auto" style:text-underline-mode="continuous"/>
    </style:style>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style="italic" style:font-style-asian="italic" style:font-style-complex="italic"/>
    </style:style>
    <style:style style:name="P414" style:parent-style-name="Heading1" style:family="paragraph">
      <style:paragraph-properties fo:break-before="page"/>
    </style:style>
    <style:style style:name="T415" style:parent-style-name="DefaultParagraphFont" style:family="text">
      <style:text-properties fo:font-weight="bold" style:font-weight-asian="bold" style:font-weight-complex="bold" fo:font-style="italic" style:font-style-asian="italic" style:font-style-complex="italic"/>
    </style:style>
    <style:style style:name="T416" style:parent-style-name="DefaultParagraphFont" style:family="text">
      <style:text-properties fo:font-weight="bold" style:font-weight-asian="bold" style:font-weight-complex="bold" fo:font-style="italic" style:font-style-asian="italic" style:font-style-complex="italic"/>
    </style:style>
    <style:style style:name="P417" style:parent-style-name="Heading1" style:family="paragraph">
      <style:paragraph-properties fo:break-before="page"/>
    </style:style>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fo:font-weight="bold" style:font-weight-asian="bold" style:font-weight-complex="bold"/>
    </style:style>
    <style:style style:name="P428" style:parent-style-name="Standard" style:family="paragraph">
      <style:text-properties fo:font-style="italic" style:font-style-asian="italic" style:font-style-complex="italic"/>
    </style:style>
    <style:style style:name="T429" style:parent-style-name="DefaultParagraphFont" style:family="text">
      <style:text-properties fo:font-style="italic" style:font-style-asian="italic" style:font-style-complex="italic"/>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fo:font-style="italic" style:font-style-asian="italic" style:font-style-complex="italic"/>
    </style:style>
    <style:style style:name="T433" style:parent-style-name="DefaultParagraphFont" style:family="text">
      <style:text-properties fo:font-style="italic" style:font-style-asian="italic" style:font-style-complex="italic"/>
    </style:style>
    <style:style style:name="T434" style:parent-style-name="DefaultParagraphFont" style:family="text">
      <style:text-properties fo:font-style="italic" style:font-style-asian="italic" style:font-style-complex="italic"/>
    </style:style>
    <style:style style:name="P435" style:parent-style-name="Standard" style:family="paragraph">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T437" style:parent-style-name="DefaultParagraphFont" style:family="text">
      <style:text-properties fo:font-style="italic" style:font-style-asian="italic" style:font-style-complex="italic"/>
    </style:style>
    <style:style style:name="T438" style:parent-style-name="DefaultParagraphFont" style:family="text">
      <style:text-properties fo:font-style="italic" style:font-style-asian="italic" style:font-style-complex="italic"/>
    </style:style>
    <style:style style:name="T439" style:parent-style-name="DefaultParagraphFont" style:family="text">
      <style:text-properties fo:font-style="italic" style:font-style-asian="italic" style:font-style-complex="italic"/>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weight="bold" style:font-weight-asian="bold" style:font-weight-complex="bold"/>
    </style:style>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T450" style:parent-style-name="DefaultParagraphFont" style:family="text">
      <style:text-properties fo:font-weight="bold" style:font-weight-asian="bold" style:font-weight-complex="bold"/>
    </style:style>
    <style:style style:name="T451" style:parent-style-name="DefaultParagraphFont" style:family="text">
      <style:text-properties fo:font-style="italic" style:font-style-asian="italic" style:font-style-complex="italic"/>
    </style:style>
    <style:style style:name="P452" style:parent-style-name="Heading1" style:family="paragraph">
      <style:paragraph-properties fo:break-before="page"/>
    </style:style>
    <style:style style:name="P453" style:parent-style-name="Heading1" style:family="paragraph">
      <style:paragraph-properties fo:break-before="page"/>
    </style:style>
    <style:style style:name="T454" style:parent-style-name="DefaultParagraphFont" style:family="text">
      <style:text-properties fo:color="#1155CC" style:text-underline-type="single" style:text-underline-style="solid" style:text-underline-width="auto" style:text-underline-mode="continuous"/>
    </style:style>
    <style:style style:name="P455" style:parent-style-name="Heading1" style:family="paragraph">
      <style:paragraph-properties fo:break-before="page"/>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ext:bookmark-start text:name="_1shby683ew25"/><text:bookmark-end text:name="_1shby683ew25"/>Lifeblood Essays</text:p>
      <text:p text:style-name="Standard"/>
      <text:p text:style-name="P2"><text:span text:style-name="T3">Table of Contents</text:span></text:p>
      <text:p text:style-name="P4"/>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5"><text:a xlink:href="#_5gmzt35xyzib" office:target-frame-name="_top" xlink:show="replace"><text:span text:style-name="T6">Precision</text:span><text:span text:style-name="T7"><text:tab/>3</text:span></text:a></text:p>
          <text:p text:style-name="P8"><text:a xlink:href="#_as43mrvyiu63" office:target-frame-name="_top" xlink:show="replace"><text:span text:style-name="T9">Etymological Investigation</text:span><text:span text:style-name="T10"><text:tab/>3</text:span></text:a></text:p>
          <text:p text:style-name="P11"><text:a xlink:href="#_9smrwkgw4emf" office:target-frame-name="_top" xlink:show="replace"><text:span text:style-name="T12">Epistemological Definition</text:span><text:span text:style-name="T13"><text:tab/>4</text:span></text:a></text:p>
          <text:p text:style-name="P14"><text:a xlink:href="#_tmvqbnkk94yf" office:target-frame-name="_top" xlink:show="replace"><text:span text:style-name="T15">Motivating Question</text:span><text:span text:style-name="T16"><text:tab/>5</text:span></text:a></text:p>
          <text:p text:style-name="P17"><text:a xlink:href="#_yfn50glidn67" office:target-frame-name="_top" xlink:show="replace"><text:span text:style-name="T18">Examples of the Value of Epistemological Precision</text:span><text:span text:style-name="T19"><text:tab/>6</text:span></text:a></text:p>
          <text:p text:style-name="P20"><text:a xlink:href="#_x096j9b25j77" office:target-frame-name="_top" xlink:show="replace"><text:span text:style-name="T21">A More General Case for Epistemological Precision</text:span><text:span text:style-name="T22"><text:tab/>7</text:span></text:a></text:p>
          <text:p text:style-name="P23"><text:a xlink:href="#_o44vup1q1pk5" office:target-frame-name="_top" xlink:show="replace"><text:span text:style-name="T24">Mechanisms of Precision</text:span><text:span text:style-name="T25"><text:tab/>7</text:span></text:a></text:p>
          <text:p text:style-name="P26"><text:a xlink:href="#_x57kt6318qh7" office:target-frame-name="_top" xlink:show="replace"><text:span text:style-name="T27">The Proper Role of Imprecision</text:span><text:span text:style-name="T28"><text:tab/>8</text:span></text:a></text:p>
          <text:p text:style-name="P29"><text:a xlink:href="#_oj6lkdemxyk" office:target-frame-name="_top" xlink:show="replace"><text:span text:style-name="T30">Context &amp; Purpose</text:span><text:span text:style-name="T31"><text:tab/>9</text:span></text:a></text:p>
          <text:p text:style-name="P32"><text:a xlink:href="#_c04fiiv04maz" office:target-frame-name="_top" xlink:show="replace"><text:span text:style-name="T33">For Generalisations</text:span><text:span text:style-name="T34"><text:tab/>9</text:span></text:a></text:p>
          <text:p text:style-name="P35"><text:a xlink:href="#_jfpq9x74b8y4" office:target-frame-name="_top" xlink:show="replace"><text:span text:style-name="T36">Correlation to Causal Claims</text:span><text:span text:style-name="T37"><text:tab/>9</text:span></text:a></text:p>
          <text:p text:style-name="P38"><text:a xlink:href="#_e7gjh84voykk" office:target-frame-name="_top" xlink:show="replace"><text:span text:style-name="T39">What Correlation Actually Tells You</text:span><text:span text:style-name="T40"><text:tab/>9</text:span></text:a></text:p>
          <text:p text:style-name="P41"><text:a xlink:href="#_t98x8ctrx2nd" office:target-frame-name="_top" xlink:show="replace"><text:span text:style-name="T42">The Immorality and Harm of Correlation-Causation Conflation</text:span><text:span text:style-name="T43"><text:tab/>9</text:span></text:a></text:p>
          <text:p text:style-name="P44"><text:a xlink:href="#_3nufhuc1r4zj" office:target-frame-name="_top" xlink:show="replace"><text:span text:style-name="T45">For Values/Value Claims</text:span><text:span text:style-name="T46"><text:tab/>13</text:span></text:a></text:p>
          <text:p text:style-name="P47"><text:a xlink:href="#_ubhpg1wffwo5" office:target-frame-name="_top" xlink:show="replace"><text:span text:style-name="T48">Infidelity</text:span><text:span text:style-name="T49"><text:tab/>13</text:span></text:a></text:p>
          <text:p text:style-name="P50"><text:a xlink:href="#_8vpaq6ze432n" office:target-frame-name="_top" xlink:show="replace"><text:span text:style-name="T51">Freedom</text:span><text:span text:style-name="T52"><text:tab/>13</text:span></text:a></text:p>
          <text:p text:style-name="P53"><text:a xlink:href="#_w8uksoc9bwhm" office:target-frame-name="_top" xlink:show="replace"><text:span text:style-name="T54">Freedom</text:span><text:span text:style-name="T55"><text:tab/>14</text:span></text:a></text:p>
          <text:p text:style-name="P56"><text:a xlink:href="#_osq6fh8wekoc" office:target-frame-name="_top" xlink:show="replace"><text:span text:style-name="T57">What is Freedom?</text:span><text:span text:style-name="T58"><text:tab/>14</text:span></text:a></text:p>
          <text:p text:style-name="P59"><text:a xlink:href="#_bzb1plrlqj4v" office:target-frame-name="_top" xlink:show="replace"><text:span text:style-name="T60">What is Freedom About</text:span><text:span text:style-name="T61"><text:tab/>15</text:span></text:a></text:p>
          <text:p text:style-name="P62"><text:a xlink:href="#_jmy1untz45fh" office:target-frame-name="_top" xlink:show="replace"><text:span text:style-name="T63">Power-Focus vs. Happiness-Focus</text:span><text:span text:style-name="T64"><text:tab/>16</text:span></text:a></text:p>
          <text:p text:style-name="P65"><text:a xlink:href="#_gefk3oeh5yer" office:target-frame-name="_top" xlink:show="replace"><text:span text:style-name="T66">The Chains of the Pursuit of Happiness</text:span><text:span text:style-name="T67"><text:tab/>18</text:span></text:a></text:p>
          <text:p text:style-name="P68"><text:a xlink:href="#_flp6rrkjoday" office:target-frame-name="_top" xlink:show="replace"><text:span text:style-name="T69">The Purpose of Life</text:span><text:span text:style-name="T70"><text:tab/>20</text:span></text:a></text:p>
          <text:p text:style-name="P71"><text:a xlink:href="#_t0gf8ujz2p2d" office:target-frame-name="_top" xlink:show="replace"><text:span text:style-name="T72">Vulnerability, Value &amp; Effort</text:span><text:span text:style-name="T73"><text:tab/>23</text:span></text:a></text:p>
          <text:p text:style-name="P74"><text:a xlink:href="#_jwf3da6fpwws" office:target-frame-name="_top" xlink:show="replace"><text:span text:style-name="T75">Vulnerability of Valuing</text:span><text:span text:style-name="T76"><text:tab/>23</text:span></text:a></text:p>
          <text:p text:style-name="P77"><text:a xlink:href="#_20ttcl82s0nq" office:target-frame-name="_top" xlink:show="replace"><text:span text:style-name="T78">Valuing is a Constant Effort</text:span><text:span text:style-name="T79"><text:tab/>24</text:span></text:a></text:p>
          <text:p text:style-name="P80"><text:a xlink:href="#_l06ahpqisita" office:target-frame-name="_top" xlink:show="replace"><text:span text:style-name="T81">What Does this Mean in Practice?</text:span><text:span text:style-name="T82"><text:tab/>24</text:span></text:a></text:p>
          <text:p text:style-name="P83"><text:a xlink:href="#_uov15rexldpy" office:target-frame-name="_top" xlink:show="replace"><text:span text:style-name="T84">Virtue &amp; Internalised Premises</text:span><text:span text:style-name="T85"><text:tab/>25</text:span></text:a></text:p>
          <text:p text:style-name="P86"><text:a xlink:href="#_x8r0zqvcuoz1" office:target-frame-name="_top" xlink:show="replace"><text:span text:style-name="T87">Ends &amp; Means, Values &amp; Virtues</text:span><text:span text:style-name="T88"><text:tab/>27</text:span></text:a></text:p>
          <text:p text:style-name="P89"><text:a xlink:href="#_qkjko9yvvybc" office:target-frame-name="_top" xlink:show="replace"><text:span text:style-name="T90">Honour</text:span><text:span text:style-name="T91"><text:tab/>28</text:span></text:a></text:p>
          <text:p text:style-name="P92"><text:a xlink:href="#_c3br4zv4dkkx" office:target-frame-name="_top" xlink:show="replace"><text:span text:style-name="T93">Conviction</text:span><text:span text:style-name="T94"><text:tab/>30</text:span></text:a></text:p>
          <text:p text:style-name="P95"><text:a xlink:href="#_egs2nbktcgh5" office:target-frame-name="_top" xlink:show="replace"><text:span text:style-name="T96">Need of Absolute Conviction</text:span><text:span text:style-name="T97"><text:tab/>30</text:span></text:a></text:p>
          <text:p text:style-name="P98"><text:a xlink:href="#_akdubwgwilwk" office:target-frame-name="_top" xlink:show="replace"><text:span text:style-name="T99">The Danger of Non-Absolutism</text:span><text:span text:style-name="T100"><text:tab/>31</text:span></text:a></text:p>
          <text:p text:style-name="P101"><text:a xlink:href="#_23hz32eemmzg" office:target-frame-name="_top" xlink:show="replace"><text:span text:style-name="T102">The Danger of Irrational Absolutism</text:span><text:span text:style-name="T103"><text:tab/>32</text:span></text:a></text:p>
          <text:p text:style-name="P104"><text:a xlink:href="#_eqow813mp830" office:target-frame-name="_top" xlink:show="replace"><text:span text:style-name="T105">“Threats” to Conviction</text:span><text:span text:style-name="T106"><text:tab/>32</text:span></text:a></text:p>
          <text:p text:style-name="P107"><text:a xlink:href="#_1s8f9ip7xngt" office:target-frame-name="_top" xlink:show="replace"><text:span text:style-name="T108">Rationality &amp; Intelligence</text:span><text:span text:style-name="T109"><text:tab/>33</text:span></text:a></text:p>
          <text:p text:style-name="P110"><text:a xlink:href="#_lpeqxhx8iby4" office:target-frame-name="_top" xlink:show="replace"><text:span text:style-name="T111">On “Being Intelligent”</text:span><text:span text:style-name="T112"><text:tab/>35</text:span></text:a></text:p>
          <text:p text:style-name="P113"><text:a xlink:href="#_nvsfk0i6phei" office:target-frame-name="_top" xlink:show="replace"><text:span text:style-name="T114">Performing Intelligence</text:span><text:span text:style-name="T115"><text:tab/>35</text:span></text:a></text:p>
          <text:p text:style-name="P116"><text:a xlink:href="#_etwd69zdmfhy" office:target-frame-name="_top" xlink:show="replace"><text:span text:style-name="T117">What Counts as Purposeful Engagement with Reality?</text:span><text:span text:style-name="T118"><text:tab/>37</text:span></text:a></text:p>
          <text:p text:style-name="P119"><text:a xlink:href="#_8g9u79f6sfds" office:target-frame-name="_top" xlink:show="replace"><text:span text:style-name="T120">Rational Performance of Intelligence</text:span><text:span text:style-name="T121"><text:tab/>37</text:span></text:a></text:p>
          <text:p text:style-name="P122"><text:a xlink:href="#_dim8qrw8kamu" office:target-frame-name="_top" xlink:show="replace"><text:span text:style-name="T123">Ideas: A Matter of Life &amp; Death</text:span><text:span text:style-name="T124"><text:tab/>39</text:span></text:a></text:p>
          <text:p text:style-name="P125"><text:a xlink:href="#_yfpfm2ftlc04" office:target-frame-name="_top" xlink:show="replace"><text:span text:style-name="T126">Action, Goals, Values and Ideas</text:span><text:span text:style-name="T127"><text:tab/>39</text:span></text:a></text:p>
          <text:p text:style-name="P128"><text:a xlink:href="#_5st4ubxk3rot" office:target-frame-name="_top" xlink:show="replace"><text:span text:style-name="T129">Delayed Ruination</text:span><text:span text:style-name="T130"><text:tab/>40</text:span></text:a></text:p>
          <text:p text:style-name="P131"><text:a xlink:href="#_6tdeg4auj4jp" office:target-frame-name="_top" xlink:show="replace"><text:span text:style-name="T132">Ideas → Conditions vs. Conditions → Ideas</text:span><text:span text:style-name="T133"><text:tab/>41</text:span></text:a></text:p>
          <text:p text:style-name="P134"><text:a xlink:href="#_z28t599zp7ai" office:target-frame-name="_top" xlink:show="replace"><text:span text:style-name="T135">False Ideas, Truth &amp; Incentive</text:span><text:span text:style-name="T136"><text:tab/>42</text:span></text:a></text:p>
          <text:p text:style-name="P137"><text:a xlink:href="#_dwr8b0hru9s7" office:target-frame-name="_top" xlink:show="replace"><text:span text:style-name="T138">Definitions &amp; the Scope of Discussion</text:span><text:span text:style-name="T139"><text:tab/>42</text:span></text:a></text:p>
          <text:p text:style-name="P140"><text:a xlink:href="#_hxpwcorjmr9q" office:target-frame-name="_top" xlink:show="replace"><text:span text:style-name="T141">Purpose of the Discussion</text:span><text:span text:style-name="T142"><text:tab/>42</text:span></text:a></text:p>
          <text:p text:style-name="P143"><text:a xlink:href="#_nihgqi5wkpus" office:target-frame-name="_top" xlink:show="replace"><text:span text:style-name="T144">Truth as Defence of Falsehood</text:span><text:span text:style-name="T145"><text:tab/>43</text:span></text:a></text:p>
          <text:p text:style-name="P146"><text:a xlink:href="#_868xlufw8t2k" office:target-frame-name="_top" xlink:show="replace"><text:span text:style-name="T147">Incentive as the Lubrication for Acceptance</text:span><text:span text:style-name="T148"><text:tab/>45</text:span></text:a></text:p>
          <text:p text:style-name="P149"><text:a xlink:href="#_6dtazm9kqxvx" office:target-frame-name="_top" xlink:show="replace"><text:span text:style-name="T150">Logic: The Method of Love</text:span><text:span text:style-name="T151"><text:tab/>48</text:span></text:a></text:p>
          <text:p text:style-name="P152"><text:a xlink:href="#_ipfom2aytvfo" office:target-frame-name="_top" xlink:show="replace"><text:span text:style-name="T153">Beauty is Downstream of Love</text:span><text:span text:style-name="T154"><text:tab/>49</text:span></text:a></text:p>
          <text:p text:style-name="P155"><text:a xlink:href="#_k9m02oh9u8u7" office:target-frame-name="_top" xlink:show="replace"><text:span text:style-name="T156">Important Philosophical Context</text:span><text:span text:style-name="T157"><text:tab/>49</text:span></text:a></text:p>
          <text:p text:style-name="P158"><text:a xlink:href="#_d1iyh7kbvk3s" office:target-frame-name="_top" xlink:show="replace"><text:span text:style-name="T159">Beauty</text:span><text:span text:style-name="T160"><text:tab/>49</text:span></text:a></text:p>
          <text:p text:style-name="P161"><text:a xlink:href="#_r7g9a18brr01" office:target-frame-name="_top" xlink:show="replace"><text:span text:style-name="T162">Love</text:span><text:span text:style-name="T163"><text:tab/>50</text:span></text:a></text:p>
          <text:p text:style-name="P164"><text:a xlink:href="#_cvw9wzja0dws" office:target-frame-name="_top" xlink:show="replace"><text:span text:style-name="T165">Love &amp; Beauty</text:span><text:span text:style-name="T166"><text:tab/>52</text:span></text:a></text:p>
          <text:p text:style-name="P167"><text:a xlink:href="#_3rzjcvt5gxfi" office:target-frame-name="_top" xlink:show="replace"><text:span text:style-name="T168">Logic is the Method of Love</text:span><text:span text:style-name="T169"><text:tab/>53</text:span></text:a></text:p>
          <text:p text:style-name="P170"><text:a xlink:href="#_tt8wq03ch458" office:target-frame-name="_top" xlink:show="replace"><text:span text:style-name="T171">Standards, Expectations &amp; Comparisons</text:span><text:span text:style-name="T172"><text:tab/>55</text:span></text:a></text:p>
          <text:p text:style-name="P173"><text:a xlink:href="#_fuz4wqe1702r" office:target-frame-name="_top" xlink:show="replace"><text:span text:style-name="T174">Evaluation &amp; Comparison</text:span><text:span text:style-name="T175"><text:tab/>56</text:span></text:a></text:p>
          <text:p text:style-name="P176"><text:a xlink:href="#_1joy2tcj7vo2" office:target-frame-name="_top" xlink:show="replace"><text:span text:style-name="T177">Definitions</text:span><text:span text:style-name="T178"><text:tab/>56</text:span></text:a></text:p>
          <text:p text:style-name="P179"><text:a xlink:href="#_80kbctsfumdq" office:target-frame-name="_top" xlink:show="replace"><text:span text:style-name="T180">Comparison in Evaluation</text:span><text:span text:style-name="T181"><text:tab/>56</text:span></text:a></text:p>
          <text:p text:style-name="P182"><text:a xlink:href="#_c3mug4kv9puk" office:target-frame-name="_top" xlink:show="replace"><text:span text:style-name="T183">Case 1: Comparing your life with others’</text:span><text:span text:style-name="T184"><text:tab/>57</text:span></text:a></text:p>
          <text:p text:style-name="P185"><text:a xlink:href="#_klzj6ekof4wn" office:target-frame-name="_top" xlink:show="replace"><text:span text:style-name="T186">Case 2: Comparing your capabilities with others’</text:span><text:span text:style-name="T187"><text:tab/>58</text:span></text:a></text:p>
          <text:p text:style-name="P188"><text:a xlink:href="#_saemhzsf5jis" office:target-frame-name="_top" xlink:show="replace"><text:span text:style-name="T189">Case 3: Comparing other people to loved ones</text:span><text:span text:style-name="T190"><text:tab/>59</text:span></text:a></text:p>
          <text:p text:style-name="P191"><text:a xlink:href="#_9pjmccw7naj5" office:target-frame-name="_top" xlink:show="replace"><text:span text:style-name="T192">Case 4: Comparing groups of people</text:span><text:span text:style-name="T193"><text:tab/>60</text:span></text:a></text:p>
          <text:p text:style-name="P194"><text:a xlink:href="#_t500uqm400cy" office:target-frame-name="_top" xlink:show="replace"><text:span text:style-name="T195">The Self &amp; Free Will</text:span><text:span text:style-name="T196"><text:tab/>61</text:span></text:a></text:p>
          <text:p text:style-name="P197"><text:a xlink:href="#_mhngerl66l7o" office:target-frame-name="_top" xlink:show="replace"><text:span text:style-name="T198">No Soul-Body Split</text:span><text:span text:style-name="T199"><text:tab/>63</text:span></text:a></text:p>
          <text:p text:style-name="P200"><text:a xlink:href="#_avkwoqsdog3h" office:target-frame-name="_top" xlink:show="replace"><text:span text:style-name="T201">Morality</text:span><text:span text:style-name="T202"><text:tab/>65</text:span></text:a></text:p>
        </text:index-body>
      </text:table-of-content>
      <text:p text:style-name="Standard"/>
      <text:h text:style-name="P203" text:outline-level="1"><text:bookmark-start text:name="_5gmzt35xyzib"/><text:bookmark-end text:name="_5gmzt35xyzib"/><text:soft-page-break/>Precision</text:h>
      <text:h text:style-name="Heading2" text:outline-level="2"><text:bookmark-start text:name="_as43mrvyiu63"/><text:bookmark-end text:name="_as43mrvyiu63"/>Etymological Investigation</text:h>
      <text:p text:style-name="Standard">I find that seeing the etymology of the word “precision” helps clarify the various interrelated concepts tied to this word. It originates from Latin “praecidere”, which means to cut off. When applied to cognitive contexts, to cut off means to differentiate and/or isolate one or more mental units from other mental units. This process is applicable for a variety of cognitive tasks, namely abstraction (i.e. isolating selected facts from a context by omitting other facts) and its extensions, i.e. unit-perception (differentiating a group of similar mental units from other mental units, thereby cognitively isolating the group) and concept-formation (i.e. integrating as a single mental unit (e.g. as a word) a number of similar units under a definition (which can be ostensive/demonstrative or itself conceptual), which involves differentiating these units from others, thereby isolating the referents of this concept from our broader cognitive context). Hence, the act of differentiation and isolation is relevant throughout conceptual-level cognition. Now, let us look at the concept of precision and recognise its relevance, if it indeed has relevance. Let us look at precision in a number of contexts before specifying its meaning in epistemology.</text:p>
      <text:p text:style-name="P204"/>
      <text:p text:style-name="Standard">(1) In the context of estimation/experimentation, precision refers to the limits of the boundaries of the outcomes — the tighter/smaller the limits, the greater the precision. For example, a procedure to create a certain item, say a button, is precise if every button produced is near-identical in dimension to every other button produced. Likewise, a model to predict the trajectory of an airplane is precise if the errors in its predictions are close to each other. This is what separates “precision” from “accuracy”, since accuracy minimises overall error, whereas precision minimises overall variance in outcome (variance being measured on the values of some metric of evaluating the outcome, e.g. error).</text:p>
      <text:p text:style-name="P205"/>
      <text:p text:style-name="Standard">(2) In the context of vocabulary, precision refers to how closely the definition, denotation and connotation of a word or phrase matches the object/quality/event being described. In other words, precision here depends on the limits of a word’s applicability; if a word is applicable in more diverse contexts, its usage is likely to be less precise, and if it is applicable in more specific contexts, its usage is likely to be more precise if used appropriately. Hence, melancholy can be a more precise concept than sadness to describe a prolonged state of low motivation and despair. Likewise, it is more precise to say that someone is 8 feet tall than it is to say that someone is “very tall”, even though both are accurate (i.e. both correspond to reality).</text:p>
      <text:h text:style-name="Heading2" text:outline-level="2"><text:bookmark-start text:name="_9smrwkgw4emf"/><text:bookmark-end text:name="_9smrwkgw4emf"/><text:soft-page-break/>Epistemological Definition</text:h>
      <text:p text:style-name="Standard">The common conceptual thread in our use of the word “precision” involves constraining the limits of breadth (potential variability or diversity) of its potential implications (i.e. its uses/applications, the range of outcomes, the diversity of its references etc.), be it in describing a situation/condition (as in describing depressive emotional states) or in evaluating materialised outcomes (as in the prediction of the airplane’s trajectory) or in materialising outcomes themselves (as in the production of buttons). The more constrained the limits of applicability are, the greater the precision is. Implication is crucial, since precision does not apply to a mental unit or measurement in and of itself but only through what it implies in relation to other mental units or measurements in the given context. Now, note that to constrain potential breadth of potential implications means increasing the particularity in potential implications and applications, i.e. reducing the potential to accommodate varied/diverse uses/applications, interpretations or outcomes. In other words,<text:s/><text:span text:style-name="T206">to be precise is to constrain a unit’s potential implications within the given context</text:span>. An implication of this view of precision is that precision is necessary only insofar and to the extent that a unit’s applicability needs to be constrained in the given context.</text:p>
      <text:p text:style-name="P207"/>
      <text:p text:style-name="Standard"><text:span text:style-name="T208">NOTE</text:span>:<text:s/><text:span text:style-name="T209">Particularity is the measure of the specificity in the mapping between a unit and its applicability within a context (i.e. within the context, how widely it can be used, how wide are its implications, etc.). It is through particularity (the kind and the level(s)) through which precision is defined and demonstrated.</text:span></text:p>
      <text:p text:style-name="P210"/>
      <text:p text:style-name="Standard">To reiterate and expand on the point on “implication” as a crucial component of precision, notice that a predicted value is not precise or imprecise by itself but only in relation to its error as compared to errors of other predicted values (here, the implication is variability/consistency). Likewise, a word is not precise or imprecise by itself but only in relation to what it is trying to describe in a given context (here, the implication is its applicability). For example, “sad” is more precise than “melancholy” when talking about a broader range of depressive emotional states, since its breadth aligns more closely with the breadth of what it is trying to describe. Note that this is not just about accuracy, since here, “sad” constrains the level of emotional detail when speaking of this broader range of depressive emotional states as a group; here, we constrain the implication of a mental unit in relation to emotional specifics/details.</text:p>
      <text:p text:style-name="P211"/>
      <text:p text:style-name="Standard">A key piece of the puzzle that leads to the definition of “precision” in epistemology is understanding how the nature of a mental unit is identified, since it is with respect to this identification that precision is achieved (or not achieved). Drawing from my discussion in<text:s/><text:a xlink:href="https://pranav-gopalkrishna.github.io/philosophy/epistemology/4-integration-of-perception.html" office:target-frame-name="_top" xlink:show="replace"><text:span text:style-name="T212">Integration of Perception (Epistemology, Philosophy,</text:span></text:a><text:s/><text:a xlink:href="http://mistermilvusmigrans.githhub.io" office:target-frame-name="_top" xlink:show="replace"><text:span text:style-name="T213">mistermilvusmigrans.githhub.io</text:span></text:a><text:a xlink:href="https://pranav-gopalkrishna.github.io/philosophy/epistemology/4-integration-of-perception.html" office:target-frame-name="_top" xlink:show="replace"><text:span text:style-name="T214">)</text:span></text:a><text:s/>about the integration of perception — the principles of which apply to cognitive<text:s/><text:soft-page-break/>integration in general — we have that any result of integration, be it a unit, a concept, a generalisation or a principle, has 2 aspects that shape its nature: context and purpose. From the conceptual basis laid with this point and the points before this, I shall propose the following definition of precision in epistemology:<text:s/><text:span text:style-name="T215">Precision is the description of the limits of the potential implications of one or more units for the given context and purpose.</text:span></text:p>
      <text:p text:style-name="P216"/>
      <text:p text:style-name="Standard">Now, note that precision, like any valid concept, is predicated on context and purpose. In other words, we measure/evaluate precision with respect to the context, i.e. the set of facts conditioning our concepts and conclusions, and with respect to our purpose in engaging with the context. Hence, the measure of precision is the measure of how close our limits on the potential implications of a mental unit or units are to the limits desired/required within the given context and purpose. Hence, we see that the crucial value of the concept of precision: precision clarifies conceptual and practical boundaries between various mental units, their referents and their implications within a given context and purpose.</text:p>
      <text:h text:style-name="Heading2" text:outline-level="2"><text:bookmark-start text:name="_tmvqbnkk94yf"/><text:bookmark-end text:name="_tmvqbnkk94yf"/>Motivating Question</text:h>
      <text:p text:style-name="Standard">The reason I decided to delve into the concept of precision was because I began to question the way I tend to approach my professional and academic work. I noticed that I spend a lot of time clarifying distinctions and exact definitions of the concepts on which the subject/topic rests or relies on in some way. In particular, I began to question this approach when trying to distinguish between the concepts of “workspace” and “catalog” in Databricks, spending at least an hour asking my colleagues, going through articles and responses from generative AI models to get a grip on the distinction. When asking my colleagues, however, I saw that though they worked with Databricks and were obviously much superior in their skill working with the platform (as I have had no experience with it), they did not bother too much with the distinction, instead conceptualising “workspace” simply as the place in which all the data and AI assets of their project were stored (which is not quite right, conceptually). My goal in elaborating on this topic is not to involve you the reader with the intricacies of Databricks, but simply to raise the question:<text:s/><text:span text:style-name="T217">what is the point of my effort in distinguishing between a workspace and a catalog when it apparently does not prevent people from utilising the platform effectively?</text:span><text:s/>After all, my own purpose in learning about Databricks was to utilise it for my company’s projects.</text:p>
      <text:p text:style-name="P218"/>
      <text:p text:style-name="Standard">Now that the motivating question of this essay is clearer, let me now try to address this question by (1) drawing upon examples where precision was vital in ensuring efficacy, and (2) outlining why, in what way and to what extent precision matters more generally. Note that here, I am speaking in particular of epistemological precision, i.e. precision in<text:s/><text:soft-page-break/>conceptual distinctions and clarifications, because making this case for other kinds of precision, e.g. statistical/mathematical/industrial/etc. precision is quite straightforward (I shall leave it as an exercise to the reader to make a case for these kinds of precision).</text:p>
      <text:h text:style-name="Heading2" text:outline-level="2"><text:bookmark-start text:name="_yfn50glidn67"/><text:bookmark-end text:name="_yfn50glidn67"/>Examples of the Value of Epistemological Precision</text:h>
      <text:p text:style-name="Standard">In my life, the most crucial example demonstrating the value of epistemological precision was in gaining rational, i.e. reality-based certainty about metaphysical axioms. Premises about the nature of existence qua existence underlie our very approach to reality, implicitly or explicitly (for clarity about why this is the case, see<text:s/><text:a xlink:href="https://mistermilvusmigrans.github.io/philosophy/intro-to-philosophy.html" office:target-frame-name="_top" xlink:show="replace"><text:span text:style-name="T219">Introduction to Philosophy (Philosophy, mistermilvusmigrans.github.io</text:span></text:a>), and thereby form the basis of our general sense of life, i.e. the aggregate of our attitudes, ambitions and approach to various kinds of situations in life (from career choices to relationships to the use of free time). Precision about what formed the basis for the self-evident facts on which truth could be established helped actually establish truth in a non-skeptical way, thereby paving the way for a rational philosophy of life.</text:p>
      <text:p text:style-name="P220"/>
      <text:p text:style-name="Standard">Another example in my life of the vital role of epistemological precision in cognition was in identifying the scope and actual epistemological quality of statistics, which I applied to dismantle prejudicial and pernicious views on (1) single motherhood, (2) gender dynamics in creativity and scientific achievement, and (3) risk evaluation (e.g. when evaluating the risks of LASIK surgery for my eyes — an effective and well-established surgical procedure, statistically — by precisely outlining the conditions of acceptable risks and how these conditions were not met in my case).</text:p>
      <text:p text:style-name="P221"/>
      <text:p text:style-name="Standard">The last example from my life that I would like to present is precision in understanding why and in what context my autonomy matters in relation to my parents’ expectations and demands. This had been difficult for me since I always looked at this issue from the lens of (1) the way my past irresponsibility/poor decisions did not give my parents confidence in my choices and (2) the fact that my parents presumably knew more/better through experience and intuition. However, the precise nature and value of autonomy became clear to me when I was writing the backstory of a fictional empire, in which I put the line: “to own something is to be able to ruin it.” This made me realise that no amount of paternalistic reasoning justified control over my decisions as an adult. Moreover, I precisely identified the nature of the evidence of my past irresponsibility and poor decisions, realising that it had less to do with an inherent lack of capability and more to do with a consistent lack of prioritising my own agency and independence (which, ironically, made the value of asserting my agency even clearer).</text:p>
      <text:h text:style-name="Heading2" text:outline-level="2"><text:bookmark-start text:name="_x096j9b25j77"/><text:bookmark-end text:name="_x096j9b25j77"/><text:soft-page-break/>A More General Case for Epistemological Precision</text:h>
      <text:p text:style-name="Standard">To put it simply, epistemological precision matters for the same reason cognition matters: to know what exists, what is its nature and how it relates to your purpose. The kind of precision required depends on the kind of the context and purpose(s); hence, ethics must be dealt with broad abstractions — here, avoiding concrete-bound rules is crucial for universal applicability — whereas for career choices, decisions must be made with knowledge of my particular inclinations, experiences, opportunities and potential routes I may take (in experiential/practical detail).</text:p>
      <text:p text:style-name="P222"/>
      <text:p text:style-name="Standard"><text:span text:style-name="T223">CLARIFYING NOTE</text:span>:<text:s/><text:span text:style-name="T224">Saying “kind of precision” rather than “level of precision” is crucial, since note that in broader contexts and purposes, it is not necessarily that we need less precision as such, but rather, we need precision about certain more abstract aspects while needing less precision (or even no precision) in other (usually less relevant and/or more concrete) aspects (the level of precision becomes relevant when we are clear what to precise about and what for). Precision is always with respect to some context and purpose (drawing from the nature of cognition and mental integration discussed here:<text:s/></text:span><text:a xlink:href="https://mistermilvusmigrans.github.io/philosophy/intro-to-philosophy.html" office:target-frame-name="_top" xlink:show="replace"><text:span text:style-name="T225">Introduction to Philosophy (Philosophy, mistermilvusmigrans.github.io</text:span></text:a><text:span text:style-name="T226">), which means a broader context and purpose need precision about broader mental units — broader essentials, principles and applications — not less precision as such (though there is less precision about narrower/more specific contexts, naturally). The question is not just “how much precision” but “how much precision about what”.<text:s/></text:span><text:span text:style-name="T227">The level of abstraction is not inversely related to the level of precision.</text:span></text:p>
      <text:p text:style-name="P228"/>
      <text:p text:style-name="Standard">The irony of being precise about precision is not lost on me, but this merely underscores the inescapable importance of precision in cognition. As I have implied in the above paragraph, precision is inherent in any coherent cognition, and the demands of precision depend on your cognitive context and purpose. As it turns out, to be precise and especially to be precise about how and in what way you must be precise is part of the essence of cognition itself, with the foundation of precision being the foundation of cognition itself: distinct, differentiated perception with purpose. As for the utility of precision in learning to use Databricks effectively, that is yet to be seen, but I am optimistic… for epistemological reasons.</text:p>
      <text:h text:style-name="Heading2" text:outline-level="2"><text:bookmark-start text:name="_o44vup1q1pk5"/><text:bookmark-end text:name="_o44vup1q1pk5"/>Mechanisms of Precision</text:h>
      <text:p text:style-name="Standard"><text:span text:style-name="T229">Credit to ClaudeAI, Sonnet 4.6</text:span></text:p>
      <text:p text:style-name="P230"/>
      <text:p text:style-name="Standard"><text:span text:style-name="T231">1. Precision Enables Correction</text:span>:<text:line-break/>Imprecise concepts are like blurry targets — you cannot tell if you have hit them or missed. Precise concepts allow you to identify errors and correct your course of thought<text:s/><text:soft-page-break/>or action. This is why scientific progress requires operational definitions: precision makes verification and falsification possible.</text:p>
      <text:p text:style-name="P232"/>
      <text:p text:style-name="Standard"><text:span text:style-name="T233">2. Precision Enables Integration</text:span>:<text:line-break/>We have noted that broader contexts need precision about broader mental units. This is crucial, since integration requires matching levels of abstraction and the corresponding kinds of precision across different domains. If your physics is concrete and your metaphysics is foggy, they cannot be coherently integrated.</text:p>
      <text:p text:style-name="P234"/>
      <text:p text:style-name="Standard"><text:span text:style-name="T235">3. Precision Prevents Equivocation</text:span>:<text:line-break/>So much bad reasoning — in philosophy, politics, everyday life — stems from using the same word with different meanings in different premises. Precision exposes these equivocations and forces conceptual honesty.</text:p>
      <text:p text:style-name="P236"/>
      <text:p text:style-name="Standard"><text:span text:style-name="T237">4. Precision Is Cognitively Liberating</text:span>:<text:line-break/>Paradoxically, by constraining the boundaries of concepts, precision actually frees thought, because when you know exactly what you mean by something, you can think more boldly and broadly with it. Imprecision forces constant backtracking, clarification and second-guessing about the implications and applicability of concepts, whereas precision clarifies the boundaries of implications and applicability.</text:p>
      <text:h text:style-name="Heading2" text:outline-level="2"><text:bookmark-start text:name="_x57kt6318qh7"/><text:bookmark-end text:name="_x57kt6318qh7"/>The Proper Role of Imprecision</text:h>
      <text:p text:style-name="Standard">As stated and implied, the kind and level of precision varies by context and purpose. In particular, the level of precision required depends on how much you can/need to/want to constrain implications/applicability. In cases with less certainty (e.g. if I know I want to study computer science without knowing what exactly I want to do with it), imprecision is actually practically and epistemologically sound, since it identifies facts without over-committing to assumptions about unknowns/variations. As another example, consider the fact that ethical principles are incredibly imprecise about what values/virtues mean in practice, since they intend to cover a broad range of specific contexts and circumstances; this imprecision is essential, since without this, ethics can become rigid and restrictive in a way that violates the core needs of one’s life and one’s pursuit of happiness (and these core needs is what ethics properly identifies and is precise about). Interestingly, my definition of precision itself involves imprecision about what “potential implications” refer to, identifying only the fact that a mental unit has effects and potentials in thinking and action while leaving open what these effects and potentials are. A similar pattern is followed by any good definition of a concept.</text:p>
      <text:p text:style-name="Standard"/>
      <text:h text:style-name="P238" text:outline-level="1"><text:bookmark-start text:name="_oj6lkdemxyk"/><text:bookmark-end text:name="_oj6lkdemxyk"/><text:soft-page-break/>Context &amp; Purpose</text:h>
      <text:h text:style-name="Heading2" text:outline-level="2"><text:bookmark-start text:name="_c04fiiv04maz"/><text:bookmark-end text:name="_c04fiiv04maz"/>For Generalisations</text:h>
      <text:h text:style-name="Heading4" text:outline-level="4"><text:bookmark-start text:name="_jfpq9x74b8y4"/><text:bookmark-end text:name="_jfpq9x74b8y4"/>Correlation to Causal Claims</text:h>
      <text:h text:style-name="Heading6" text:outline-level="6"><text:bookmark-start text:name="_e7gjh84voykk"/><text:bookmark-end text:name="_e7gjh84voykk"/>What Correlation Actually Tells You</text:h>
      <text:p text:style-name="Standard">This is perhaps almost a platitude in statistics, but its truth is not only undeniable but incredibly relevant:<text:s/><text:span text:style-name="T239">correlation does not equal causation</text:span>. Let us first understand these terms, and see what it really takes to establish causal claims, and how evidence apart from statistical evidence can reveal more about causal relationships than correlation, no matter how strong or persistent the correlation is.</text:p>
      <text:p text:style-name="P240"/>
      <text:p text:style-name="Standard">Correlation is fundamentally a quantitative concept — be the scale real, interval or ordinal — for it is the measure of both the direction and magnitude of the changes in one attribute’s values corresponding to changes in another attribute’s values. In other words, it measures how and how much attribute Y changes — along whatever scale we are using — with changes in X. It is key to note that correlation does not actually give as a causal relationship but a quantitative one. Indeed, coincidence, confounding factors, indirect causation and causation webs that often give rise to correlation between 2 attributes even when these attributes are not related causally. For example, the sun’s distance in the sky relative to the horizon correlates with higher temperature, but it is not this distance as such that is the cause but the insolation time and reduced atmospheric interference at angles closer to the normal of Earth’s axis that cause both the sun’s distance in the sky and the temperature rise. As another example, in India, Muslims are less economically affluent on average compared to Hindus and Christians, but it is not being a Muslim that is the cause of it in and of itself — there are affluent Muslims as well — but rather factors such as poorer education and infrastructure coinciding with areas with larger Muslim populations (either by coincidence or social segregation), discrimination in the formal job market and more restrictive attitudes toward female education and employment, which can be influenced (but may not be) by the fact of being a Muslim but are the consistent and reliable causes that go beyond simply being a Muslim and involve being a Muslim in a certain context with certain social and historical interactions of factors.</text:p>
      <text:h text:style-name="Heading6" text:outline-level="6"><text:bookmark-start text:name="_t98x8ctrx2nd"/><text:bookmark-end text:name="_t98x8ctrx2nd"/>The Immorality and Harm of Correlation-Causation Conflation</text:h>
      <text:p text:style-name="Standard">I had seen a particularly pernicious abuse of statistics with regards to single parenthood, particularly in studies comparing single mother households to single father households, showing much better outcomes overall with regards to median incomes, educational attainment and incarceration rates for children belonging to single father<text:s/><text:soft-page-break/>households. On their own, these are neutral statistics — although I shall touch on the neutrality of seeking these specific statistics shortly. What I find pernicious is taking the correlation of the gender of the parent to the outcomes as causally significant. The reason this is pernicious is not because of sexism or misogyny, but because of abysmal epistemological standards that confound the issue and obscure any constructive steps that can be taken to address the challenges faced by single mothers in particular and single parents in general. Why?</text:p>
      <text:p text:style-name="P241"/>
      <text:p text:style-name="Standard">Consider: what does it take to parent a child effectively? Sufficient resources, allocation of time, focus on education, adequate socialisation, providing learning and exploration opportunities, setting moral examples, setting clear behavioural boundaries, etc. These aspects of rearing a child are dependent on critical engagement, motivation, opportunities for the parent (professional), social support, communication and personal character. Unless you believe something about being female makes you inherently inferior human beings intellectually, morally and makes you lack enough energy to manage the level of responsibilities required by such a role — all of which are evidently false as generalisations, given substantial examples to the contrary (women in various high-stress and critical roles, from doctors to politicians to teachers) and facts of biological differences (that do not reveal any fundamental gap in intellectual ability, self-control and thereby self-determination and moral agency) — these aspects of parenting are not gendered. I grant that gender can give first-hand insight into gender-specific issues, e.g. puberty, periods, etc., but these are rarely generalisable even within a gender and can be learnt second-hand or first-hand by another trusted figure of that gender. If you are fond of statistics, it would be interesting to note that same-sex couples, lesbians or gay males, do not necessarily produce worse outcomes for children on average than heterosexual couples (see:<text:s/><text:a xlink:href="https://pmc.ncbi.nlm.nih.gov/articles/PMC10016267/" office:target-frame-name="_top" xlink:show="replace"><text:span text:style-name="T242">Family outcome disparities between sexual minority and heterosexual families: a systematic review and meta-analysis - PMC</text:span></text:a>; though the sample sizes are small, ranging from 100-2000 for different parameters, they offer a peek at the potential diversity of outcomes), and the statistics that are unfavourable to the outcomes of single mothers are not universal outcomes, only aggregates that also include a large number of functional households and positive outcomes. Combining this with a wide variety of positive and neutral anecdotal evidence, we see that generalising from statistics to the inherent ability of single mothers is not only absurd but contradicted by counterexamples that are by no means outliers or exceptions.</text:p>
      <text:p text:style-name="P243"/>
      <text:p text:style-name="Standard">Furthermore, what are actually confounded in this generalisation are the actual factors affecting parenting abilities that have an impact regardless of familiar structure, namely economic standing and the educational status of the parent (both of which together affect work-related stress and time/energy burden, time availability and professional<text:s/><text:soft-page-break/>opportunities). Statistically, (see:<text:s/><text:a xlink:href="https://www.americanprogress.org/press/release-the-economic-status-of-single-mothers" office:target-frame-name="_top" xlink:show="replace"><text:span text:style-name="T244">RELEASE: The Economic Status of Single Mothers - Center for American Progress</text:span></text:a>), single mothers are significantly more likely to live in poverty and have a significantly lower median income compared to single fathers. In fact, studies that account for these factors do not necessarily place single mothers at a disadvantage in terms of outcomes (updated for US around 2025, reference:<text:s/><text:a xlink:href="https://www.aecf.org/blog/child-well-being-in-single-parent-families" office:target-frame-name="_top" xlink:show="replace"><text:span text:style-name="T245">Child Well-Being in Single-Parent Families - The Annie E. Casey Foundation</text:span></text:a>). Furthermore, generalising about the parental quality of single mother households ignores key confounding factors that led to the single parenthood. Firstly there are vastly more single mothers (~80% out of total single parents), mainly because in case of children out of wedlock or in case of custody after divorce, the mother usually ends up as the guardian of the child. This means, in effect, that single fathers often become single fathers due to being especially favourable as a parent (they have to “prove themselves” to be capable of raising the child under much more scrutiny) or due to disinterest/incapacity from the mother; this already produces a selection bias favouring single fathers. Furthermore, a significant proportion of single mothers became mothers out of wedlock (~40% of births in the US around 2010 were to unmarried women), with the father backing out of commitment; this is an extremely disadvantageous position economically and socially, especially for younger women (who tend to face this issue more often). It should also be noted that many divorce cases occur due to dysfunctional marriages or even abuse, which means single motherhood is not something the mother may be especially prepared or equipped for, but rather, may be circumstantially compelled into (such circumstantial compulsion can happen with single fathers as well). These factors together paint a picture that reveals that single mothers and single fathers, as broad groups, are usually operating from a very different set of circumstances, which means that even right off the bat, even without evidence showing gender-based generalisations as invalid, we cannot jump to gender as the difference that makes the difference.</text:p>
      <text:p text:style-name="P246"/>
      <text:p text:style-name="Standard"><text:span text:style-name="T247">Reference</text:span>:<text:s/><text:a xlink:href="https://en.wikipedia.org/wiki/Single_parent" office:target-frame-name="_top" xlink:show="replace"><text:span text:style-name="T248">Single parent - Wikipedia</text:span></text:a></text:p>
      <text:p text:style-name="P249"/>
      <text:p text:style-name="Standard">What was the point of my discussion about single parenthood, and why do I regard it as pernicious? The answer is simply this: by fixating on non-essential factors and ignoring far more significant underlying causes and mitigations, economic and social, we would tend only to reinforce existing prejudices (e.g. stigma against single mothers, causing further stress to an already stressful situation) and prevent thought toward measures that would improve actual outcomes of actual people. I mean, think about it, what is achieved by stating that absent fathers increase the risk of delinquency or poor educational and economic outcomes? This statement misses the fact that fatherhood as such is not a silver bullet against these risks and the lack of it does not doom a child. It also misses the fact that the wrong kind of parent, mother or father, can ruin someone’s<text:s/><text:soft-page-break/>life, and many women who are single mothers either cannot afford to or are unwilling to engage with potential fathers due to either the lack of time, the lack of opportunity (the dating pool for single mothers tends to be constrained) or the unwillingness to take a risk based on their past experiences. To these women, the risk posed due to absent fathers offers zero mitigation strategies. Why not study the successful examples of single motherhood to see what they did right, instead of painting the whole sub-population with a broad brush that obscures viable solutions? This brings me to the point of collecting such statistics in the first place and not exploring confounding factors. Why place such importance of gender-differences in parenthood to begin with, especially without focusing on other factors that, in any analysis of parenthood, would prove far more significant? While I cannot divine the motives of these researchers and those who cite them, I shall venture to guess that it is either a poorly thought-out research question, or it is a way to propagate an agenda, e.g. agenda against divorce (urging women to stay in unsatisfactory or toxic marriages, which in turn may aim to minimise the importance of women’s expectations in a marriage), agenda against extra-marital intimacy (especially if this is coupled with a pro-life position, since the right to abortion would give women a way out of single motherhood if a relationship does not work out after being impregnated), etc. As for actually achievable solutions? Seeking social/familial support, instilling values for healthy suspicion and responsible behaviour in men and women, improving economic opportunities and social support especially in low-income areas, improving the quality of education and neighbourhood safety, financial preparation, urging for improvements in workplace considerations for single parents, removing unwarranted stigma (professionally and socially) against single motherhood, removing legal barriers to abortion, etc.? No mention, apparently because the comfort of confirmation feels better than actually engaging with the problems at hand.</text:p>
      <text:p text:style-name="P250"/>
      <text:p text:style-name="Standard"><text:span text:style-name="T251">SIDE NOTE 1</text:span>:<text:s/><text:span text:style-name="T252">As for gendered parenting strategies, I find it not quite gendered as much as either cultural or individual. Mothers and fathers, their backgrounds, their characters and their parenting strategies can scarcely be grouped by gender without glossing over the great cultural and individual variability. Indian mothers tend to be very different from Swiss ones, and individual mothers in India and Switzerland would likely have different styles of parenting, depending on how much their individuality was allowed to develop apart from cultural expectations. This I say by personal experience, by the fact that statistics are far from universal in their observations and due to the fact that cultural differences (e.g. focus on discipline and education in some cultures, laissez-faire attitudes in others, etc.) can override any broad gender-specific differences, such as they exist broadly speaking. Moreover, gender-specific differences, such as they are, serve at most as an indirect influence on the character, practices and personality of the individual along with any cultural/societal expectations and attitudes;<text:s/></text:span><text:soft-page-break/><text:span text:style-name="T253">my point here is to say that there is nothing inherent in being a man or a woman that automatically makes you a better parent, since both are full human beings and shape their own soul from a starting point that is largely tabula rasa.</text:span></text:p>
      <text:p text:style-name="P254"/>
      <text:p text:style-name="Standard"><text:span text:style-name="T255">SIDE NOTE 2</text:span>:<text:s/><text:span text:style-name="T256">It is often said that boys need male role models, and girls benefit from having a father figure. While I do not deny the need for relatable role models and the security and example set by a father figure, the needs of children can be quite individual and diverse. Generally, 2 children are unlikely to benefit in the same way from the same approach, attitude or environment. Moreover, needless to say, having a father does not guarantee a good role model or father figure; good fatherhood — or good motherhood, for that matter — is not a divinely ordained state of being, and what a child may need or find inspiring can vary greatly by age, circumstance and cognitive/moral development. Instead of making vague claims about the importance of fatherhood or motherhood, I think it is vital to actually explore the dynamics of healthy parenthood from diverse sources and familial structures (yes, check out the gays as well) and actually investigate the interaction of key factors such as culture, education quality and socialisation.</text:span></text:p>
      <text:h text:style-name="Heading2" text:outline-level="2"><text:bookmark-start text:name="_3nufhuc1r4zj"/><text:bookmark-end text:name="_3nufhuc1r4zj"/>For Values/Value Claims</text:h>
      <text:h text:style-name="Heading4" text:outline-level="4"><text:bookmark-start text:name="_ubhpg1wffwo5"/><text:bookmark-end text:name="_ubhpg1wffwo5"/>Infidelity</text:h>
      <text:p text:style-name="Standard">Cheating is not inherently wrong; it depends on the context. Let us say you are a woman forced into a marriage, sucked into responsibilities that you are “supposed to take” regardless of reward, let alone your own goals. Moreover, you don't find much fulfillment with your husband, who may not be cruel, but is certainly someone who is not deeply invested in your well-being in this constrained environment. Then, you meet a lively young man who sees you, appreciates you, offers you a chance and courage to explore intimacy, connection and excitement. On top of this, you cannot separate from your husband out of fear of severe repercussions and ostracisation. Is it wrong to cheat here? If you do it cautiously, I would even encourage you to cheat! Now, in most modern contexts, is it wrong to cheat? Yes, but it is crucial to understand why, otherwise you can't address the moral and practical issue at the core of cheating. Cheating is wrong if and when it involves deceiving your chosen partner about the nature of your commitment, provided the cost of honesty is not your life or safety, because such deception undermines your ability to value this partnership and makes the connection you cheated for unsustainable and constrained. Yes, it is all about you, I know, very selfish. But I am all about selfishness.</text:p>
      <text:h text:style-name="Heading4" text:outline-level="4"><text:bookmark-start text:name="_8vpaq6ze432n"/><text:bookmark-end text:name="_8vpaq6ze432n"/>Freedom</text:h>
      <text:p text:style-name="Standard">See:<text:s/><text:a xlink:href="#_w8uksoc9bwhm" office:target-frame-name="_top" xlink:show="replace"><text:span text:style-name="T257">Freedom</text:span></text:a></text:p>
      <text:h text:style-name="P258" text:outline-level="1"><text:bookmark-start text:name="_w8uksoc9bwhm"/><text:bookmark-end text:name="_w8uksoc9bwhm"/><text:soft-page-break/>Freedom</text:h>
      <text:h text:style-name="Heading2" text:outline-level="2"><text:bookmark-start text:name="_osq6fh8wekoc"/><text:bookmark-end text:name="_osq6fh8wekoc"/>What is Freedom?</text:h>
      <text:p text:style-name="Standard">Freedom, in the context of volitional action, is the capacity of an individual to act on their own judgement, moral and/or practical. This is what the term “free choice” denotes: not the freedom to do anything we want, but the freedom to judge the facts and act accordingly. When applying the concept of freedom in the context of epistemology, we base the importance of the capacity of free choice on the fact that the only judgement we can ultimately trust is our own. To trust another’s judgement blindly, not knowing whether it is right in one’s context or whether there are other potentially more powerful pathways to one’s needs and desires, is to abdicate one’s judgement and thereby one’s life itself to the mercy of any authority that has wooed or subdued you. And if you do not trust blindly, that is then your judgement. Either way, your judgement and the power to exercise it is crucial.</text:p>
      <text:p text:style-name="Standard"/>
      <text:p text:style-name="Standard">This naturally applies to ethics, since to act morally presupposes the ability to make judgements on values, virtues and the moral principles that support them. Moral judgement ultimately relies on epistemology, and valid epistemology relies on free choice to act according to what we perceive (“act” in this context refers to both cognitive and physical acts).</text:p>
      <text:p text:style-name="Standard"/>
      <text:p text:style-name="Standard">To extend this to a social context, we must recognise 2 facts: (1) the value of freedom and (2) the value of coexistence that does not undermine freedom. Here, it is key to draw from the previous 2 paragraphs and understand why freedom is necessary and in what context is it enabled. To address the question of necessity, as we have established, freedom is necessary to think and act according to one’s own moral and practical judgement. To address the question of enablement, it is key to note that freedom is about dealing with the facts without arbitrary constraints imposed either by oneself or others. Why? Because to be arbitrary is to be unfounded in any rational basis for value or truth, and the domain of the arbitrary is therefore infinite and infinitely proliferatable (i.e. any “boundary” to arbitrary notions would have to be arbitrary). Arguments against the arbitrary in epistemology (and by extension, ethics) are further explored here:</text:p>
      <text:p text:style-name="Standard"/>
      <text:list text:style-name="WWNum3">
        <text:list-item>
          <text:p text:style-name="P259"><text:a xlink:href="https://mistermilvusmigrans.github.io/philosophy/epistemology/rationality-in-practice/4-rational-application-of-volition.html" office:target-frame-name="_top" xlink:show="replace"><text:span text:style-name="T260">Rational Application of Volition (Rationality in Practice, Epistemology, Philosophy, mistermilvusmigrans.github.io)</text:span></text:a></text:p>
        </text:list-item>
        <text:list-item>
          <text:p text:style-name="P261"><text:a xlink:href="https://mistermilvusmigrans.github.io/philosophy/epistemology/rationality-in-practice/5-principles-for-rationality-in-practice.html" office:target-frame-name="_top" xlink:show="replace"><text:span text:style-name="T262">Principles for Rationality in Practice (</text:span></text:a><text:a xlink:href="https://mistermilvusmigrans.github.io/philosophy/epistemology/rationality-in-practice/5-principles-for-rationality-in-practice.html" office:target-frame-name="_top" xlink:show="replace"><text:span text:style-name="T263">Rationality in Practice, Epistemology, Philosophy, mistermilvusmigrans.github.io</text:span></text:a><text:a xlink:href="https://mistermilvusmigrans.github.io/philosophy/epistemology/rationality-in-practice/5-principles-for-rationality-in-practice.html" office:target-frame-name="_top" xlink:show="replace"><text:span text:style-name="T264">)</text:span></text:a></text:p>
        </text:list-item>
      </text:list>
      <text:p text:style-name="Standard">The focus on arbitrary is precisely for one reason: the importance of freedom is<text:s/><text:soft-page-break/>grounded in the importance of being able to use one’s reason and act on it, and the arbitrary (in value or truth) is what destroys rationality in practice (for reasons outlined previously and explored in the linked articles). Hence, the key to ensuring freedom is to ensure non-arbitrariness, both from oneself and from others. In practice, the only way the arbitrary notions of other people impact your ability to act on your own judgement is if they coerce you (i.e. override your autonomy or threaten essential values (essential in sustaining your life autonomously), namely life, autonomy or property). Note that there are ways to coerce or compromise one’s judgement beyond physical coercion, and these have to be more precisely understood so they can be precisely opposed (e.g. fraud, manipulation, inducing/causing emotional distress, etc.). But leaving aside the practical points of detail, the philosophical point of essence is that in a social and, by extension, political context, to protect freedom epistemologically and ethically (at an individual level), we must protect individuals against arbitrary constraints and compulsions, and thus, against coercion.</text:p>
      <text:p text:style-name="Standard"/>
      <text:p text:style-name="Standard">With this context, let us be more expressive about what freedom is about.</text:p>
      <text:h text:style-name="Heading2" text:outline-level="2"><text:bookmark-start text:name="_bzb1plrlqj4v"/><text:bookmark-end text:name="_bzb1plrlqj4v"/>What is Freedom About</text:h>
      <text:p text:style-name="Standard">Many think the pursuit of freedom is important for promoting happiness and wellbeing. In my view, it is certainly not. Freedom is not about happiness, it is about power, power over one’s own life. Now, whether this power is used effectively or not… that is of course up to the individual and their circumstances. But it is key to note that freedom is not important for happiness but for power, and power can, with the right judgement, the right action and potentially the right circumstances, lead to happiness, barring accidents, misfortune and disasters. This power is not a vanity, it is a matter of life and death, because epistemologically (as discussed before), the only judgement we can really trust is our own. To reiterate (as I think it bears repeating), to trust another’s judgement blindly, not knowing whether it is right in one’s context or whether there are other potentially more powerful pathways to one's needs and desires — this is to abdicate one’s judgement and thereby one’s life itself to the mercy of any authority that has wooed your spirit. And if you do not trust blindly, well, that is then your judgement. Either way, your judgement and the power to exercise it is crucial.</text:p>
      <text:p text:style-name="Standard"/>
      <text:p text:style-name="Standard">To make my position clear, let me address the point of how (some may claim) freedom for women has led to a number of problems (individually and socially) due to poor judgement, mental health issues and the breakdown of societal expectations. My response is: this is a power that is each human’s right, and women are humans in full. If things are going awry — not in an objective crisis/emergency, where there are objective mitigating factors for rational judgement, but in general — and if your solution is to curtail freedoms, I will oppose you even as I try to learn and teach how to think, act and<text:s/><text:soft-page-break/>build. This is because rationality is not an instinct; it is not intuitive nor trivial. Rather, it is a virtue the vast majority of humankind have failed to develop sufficiently across human history. If you ask people to place trust in benevolent tyrants, I would only suspect that you either want to be a tyrant or want to live in the comfortable illusion of stability in an inherently unstable existence.</text:p>
      <text:p text:style-name="Standard"/>
      <text:p text:style-name="Standard">What about long-term sustainability, stable institutions, safe social environments, etc.? Are these not important? They very much are, but to achieve them through tyranny is like paralysing someone’s legs to prevent him from falling off a cliff or into ditches. The focus of our pursuit of freedom must be as much about figuring out principles, values, virtues and practical systems to enable and encourage these as it should be about securing rights. As much as I do not want to affiliate myself with him, I must give credit where credit is due by reiterating Dr. Jordan Peterson’s point about giving importance to responsibility as much (or perhaps more than) rights. Is this achievable? Eventually, through education, the dissemination of ideas, art and media, etc. But it is admittedly a long process. Better late than never.</text:p>
      <text:p text:style-name="Standard"/>
      <text:p text:style-name="Standard"><text:span text:style-name="T265">Stability is a lie, epistemologically and empirically speaking, especially because nature operates on absolute principles but our knowledge of nature's course is always limited.</text:span></text:p>
      <text:h text:style-name="Heading2" text:outline-level="2"><text:bookmark-start text:name="_jmy1untz45fh"/><text:bookmark-end text:name="_jmy1untz45fh"/>Power-Focus vs. Happiness-Focus</text:h>
      <text:p text:style-name="Standard">When I speak of power here, I speak of rational and moral agency. In my analysis, power is the fundamental instrument of morality, whereas happiness is the state of successful rational and moral existence. Hence, to focus on happiness is useful insofar as it helps you recognise the conditions for and demands of success. As a desired state, however, it is quite abstract, since practically, success comes in varied forms and cannot serve as a concrete motivation. I find this fascinating, since we often consider chasing success as important or at least good, yet it can only be “chased” as an abstract framework (which may or may not be valid and may need to be updated with new knowledge) rather than a concrete north-star.</text:p>
      <text:p text:style-name="Standard"/>
      <text:p text:style-name="Standard">In other words, happiness-focus is indistinguishable in practice from value-focus, virtue-focus and truth-focus, i.e. focus on the facts and how to act amid these facts to pursue our values — in other words, happiness-focus is simply rational/moral awareness. The problem is when we try to make happiness-focus a concrete motivation or “north-star”, because we inevitably make our goal a feeling or imagined state of existence that is probably too specific to account for the actual variations of success open to us.</text:p>
      <text:p text:style-name="Standard"/>
      <text:p text:style-name="Standard">The implication of this, when it comes to freedom, is that freedom cannot be sought primarily for happiness, because happiness is at best a broad set of conditions that<text:s/><text:soft-page-break/>imply successful living; it is a valid goal to orient ourselves toward, but it is not what freedom as such is for (even though freedom can be used for it). Rather, as established, freedom is directly about power, i.e. rational and moral agency; happiness-focus comes later, as an application of freedom and not its core justification.</text:p>
      <text:p text:style-name="Standard"/>
      <text:h text:style-name="P266" text:outline-level="1"><text:bookmark-start text:name="_gefk3oeh5yer"/><text:bookmark-end text:name="_gefk3oeh5yer"/><text:soft-page-break/>The Chains of the Pursuit of Happiness</text:h>
      <text:p text:style-name="Standard">Let me first define my terms. In this context, I define happiness more broadly than I have defined it in my other essays (e.g.<text:s/><text:a xlink:href="https://mistermilvusmigrans.github.io/philosophy/philosophy-in-practice/6-pursuit-of-happiness.html" office:target-frame-name="_top" xlink:show="replace"><text:span text:style-name="T267">The Pursuit of Happiness (Philosophy in Practice, Philosophy,<text:s/></text:span></text:a><text:a xlink:href="http://mistermilvusmigrans.github.io" office:target-frame-name="_top" xlink:show="replace"><text:span text:style-name="T268">mistermilvusmigrans.github.io</text:span></text:a><text:a xlink:href="https://pranav-gopalkrishna.github.io/philosophy/philosophy-in-practice/6-pursuit-of-happiness.html" office:target-frame-name="_top" xlink:show="replace"><text:span text:style-name="T269">)</text:span></text:a>) in order to capture the concept in the context of a broader range of value-systems. I define happiness as follows: happiness is the state of consciousness arising from the achievement of one’s values that exists as an end in itself — i.e. it is primarily a goal rather than primarily instrumental.</text:p>
      <text:p text:style-name="Standard"/>
      <text:p text:style-name="Standard"><text:span text:style-name="T270">The following draws from “Happiness-Focus vs. Power-Focus” in<text:s/></text:span><text:a xlink:href="#_w8uksoc9bwhm" office:target-frame-name="_top" xlink:show="replace"><text:span text:style-name="T271">Freedom</text:span></text:a><text:span text:style-name="T272"><text:s/>.</text:span></text:p>
      <text:p text:style-name="Standard"/>
      <text:p text:style-name="Standard">Since happiness is a state of consciousness based on the achievement of your values, to focus on happiness is useful insofar as it helps you recognise the conditions for and demands of success (i.e. the “goal” state with respect to your values). In other words, happiness-focus is indistinguishable in practice from value-focus, virtue-focus and truth-focus, i.e. focus on the facts and how to act amid these facts to pursue our values — in other words, happiness-focus is simply rational/moral awareness. The problem is when we try to make happiness-focus a concrete motivation or “north-star”, because we inevitably make our goal a feeling or imagined state of existence that is probably too specific to account for the actual variations of success open to us.</text:p>
      <text:p text:style-name="Standard"/>
      <text:p text:style-name="Standard">But there is another pitfall in happiness-focus as a concrete motivation. It can be difficult or practically impossible to judge the value of certain outcomes detached from the context in which we achieve them. For example, is becoming rich valuable to us, regardless of whether we achieve it through business or drudgery bank robbery? How does the value for money weigh into our happiness considering other values such as relationships, enjoyment of the moment, all-round development of knowledge, etc.? Who is to say whether focusing more on one or another is more or less valuable in its outcome?</text:p>
      <text:p text:style-name="Standard"/>
      <text:p text:style-name="Standard">I posit that the reason these judgements are difficult ties back to the issue with happiness-focus as a concrete motivation: these judgements try to particularise success with insufficient information about the way the pursuit of our values would shape the specifics of success in our context, both in the present and as it develops in the future. In other words, we fixate on particular ideals without ensuring they reflect abstract ideals applied to our particular context. But though this pitfall is related to the core issue with happiness-focus, I wanted to draw attention to it to draw attention to a dangerous consequence of this corollary issue.</text:p>
      <text:p text:style-name="Standard"/>
      <text:p text:style-name="Standard">Happiness-focus as a concrete motivation leaves us vulnerable to dysfunctional or<text:s/><text:soft-page-break/>disempowering notions about what we should value or prioritise when faced with circumstances that undermine our agency and long-term autonomy. If we internalise the value of comfort and community over the assertion of individual rights, we serve to act in ways that can ensure comfort perhaps in our lifetime while degrading the foundations of individual rights, which in turn would degrade the conditions that humans need to create, develop and flourish according to rational judgement and self-interest. If we internalise the prioritisation of fear of social disapproval over authenticity in our epistemological and ethical stances, we may never be able to let these ideas be absorbed in society, thereby dooming people to the same ways of being that may harm them (e.g. sexism/misogyny, racism, dogmatic thinking, community-based special pleading, tribalism, etc.).</text:p>
      <text:p text:style-name="Standard"/>
      <text:p text:style-name="Standard">Let me be more precise. What I am advocating against is the internalisation of a hierarchy of values that serves to idealise a concrete vision of happiness (i.e. the state of having achieved one’s values). What I am advocating for is the internalisation of hierarchy of values that serves to idealise a concrete vision of wide-ranging capacity, i.e. the conditions and capabilities needed to achieve values within a variety of contexts. The reason is because wide-ranging capacity is both particular in acquisition (e.g. bodily strength, mental acuity, philosophical clarity) while being generalisable in application, whereas a concrete vision of an end-state is a particular context we want to reach that depends on capacity and circumstance. The former is something we can exercise to achieve values, while the latter can obfuscate the version of our values we can actually achieve in our context.</text:p>
      <text:p text:style-name="Standard"/>
      <text:p text:style-name="Standard"><text:span text:style-name="T273">NOTE</text:span>:<text:s/><text:span text:style-name="T274">Goals cannot be merely abstract, which is why you must strive to concretise them. This is why being able to concretise capacity-related goals (or “power-focus” as I like to call it) is a valuable step, since it concretises your goals while allowing you to adapt your actions to changing contexts or knowledge.</text:span></text:p>
      <text:p text:style-name="Standard"/>
      <text:h text:style-name="P275" text:outline-level="1"><text:bookmark-start text:name="_flp6rrkjoday"/><text:bookmark-end text:name="_flp6rrkjoday"/><text:soft-page-break/>The Purpose of Life</text:h>
      <text:p text:style-name="Standard">To ask “what is the purpose of life” is a question that drops the context of the concept of “purpose”. Firstly, “purpose” is never free-floating, it is always a purpose of something or someone. This pedantic point aside, let us speak of one’s purpose rather than a free-floating “purpose”. One’s purpose is ultimately about orienting oneself toward some potential, which means it is, in essence, about orienting toward one alternative among multiple alternatives. Tracing back alternative-sets to the basic alternative-set, we get the following: to orient oneself toward one’s existence or not. To orient oneself toward (i.e. be continually and consistently aligned toward) one’s existence — this is the essence of one’s life. Hence, what we see is that one’s life does not<text:s/><text:span text:style-name="T276">have</text:span><text:s/>purpose as much as it<text:s/><text:span text:style-name="T277">is</text:span><text:s/>one’s purpose. One’s life is one’s purpose at the most fundamental of motivation.</text:p>
      <text:p text:style-name="Standard"/>
      <text:p text:style-name="Standard">I think the core intent of asking “what is the purpose of life” is to seek a basis for purpose that is not essentially arbitrary, arbitrary being that which has no basis in fact but is not necessarily false. Affirming a fact is not arbitrary, and affirming the fact of existence in thought and action — i.e. through the act of living — is certainly not arbitrary. As a volitional being, you can choose to care about life or not, and there may be reasons you may not choose to do so (e.g. when life as the kind of being we are — volitional beings — becomes impossible due to the destruction of potential, e.g. through a degenerative terminal illness, through physical/practical incapacitation, etc.). But only when you choose life can you then move to doing things for it and through it, and this choice is not arbitrary if chosen for its own sake (because choosing it for its own sake is choosing to committedly affirm the fact of existence). You do not have to live as some sort of a moral principle, but rather, moral principles only come into the picture when you choose life.</text:p>
      <text:p text:style-name="Standard"/>
      <text:p text:style-name="Standard">I posit that the choice of caring about one’s life is epistemological, not ethical. I posit that it starts with the choice to care about the truth, about what<text:s/><text:span text:style-name="T278">is</text:span>. Ethics only begins once this choice is made. Thus, in this respect, refusing to care about one’s life just because you can is refusing to engage with existence in a committed way. Thus, the fundamental virtue of ethics comes from this basic choice, this virtue being rationality. If you choose not to be rational, that is your epistemological failing that cascades into an ethical failing from the point of view of those who did choose to be rational. So what should you do? Look around and decide for yourself. There is a right and wrong, and it begins with truth, not morals.</text:p>
      <text:p text:style-name="Standard"/>
      <text:p text:style-name="Standard"><text:span text:style-name="T279">NOTES</text:span>:</text:p>
      <text:list text:style-name="WWNum7">
        <text:list-item>
          <text:p text:style-name="P280"><text:span text:style-name="T281">You could choose to exist without being rational; I would not recommend it</text:span></text:p>
        </text:list-item>
        <text:list-item>
          <text:p text:style-name="P282"><text:span text:style-name="T283">Rationality does not depend on choosing life, since truth comes first</text:span></text:p>
        </text:list-item>
      </text:list>
      <text:soft-page-break/>
      <text:list text:style-name="WWNum10">
        <text:list-item>
          <text:p text:style-name="P284"><text:span text:style-name="T285">Affirming the fact of existence — the basic act of reason — affirms one’s life</text:span></text:p>
        </text:list-item>
      </text:list>
      <text:p text:style-name="Standard"/>
      <text:p text:style-name="Standard"><draw:custom-shape svg:x="0in" svg:y="0in" svg:width="0.00069in" svg:height="0.02083in" draw:id="id0" draw:style-name="a0" draw:name="Rectangle 2121122963" text:anchor-type="as-char"><svg:title/><svg:desc/><text:p text:style-name="Normal"/><draw:enhanced-geometry draw:type="non-primitive" svg:viewBox="0 0 21600 21600" draw:enhanced-path="M 0 0 L 21600 0 21600 21600 0 21600 Z N"/></draw:custom-shape></text:p>
      <text:p text:style-name="Standard"/>
      <text:p text:style-name="Standard"><text:span text:style-name="T286">In the end, however, the core idea is as follows…</text:span></text:p>
      <text:p text:style-name="Standard"/>
      <text:p text:style-name="Standard">Life does not have a purpose. Life is a purpose, and being a self-generated, self-sustaining act, it is a self-fulfilling purpose. Do you want it? Look at the world around you. Do you want to look at it? Do you want to know it? Engage with it, knowing that the only choice rooted in fact is the choice to engage with the facts? My answer to these questions is: yes. But no one can answer these questions for you except yourself.</text:p>
      <text:p text:style-name="Standard"/>
      <text:p text:style-name="Standard"><draw:custom-shape svg:x="0in" svg:y="0in" svg:width="0.00069in" svg:height="0.02083in" draw:id="id1" draw:style-name="a1" draw:name="Rectangle 1924834570" text:anchor-type="as-char"><svg:title/><svg:desc/><text:p text:style-name="Normal"/><draw:enhanced-geometry draw:type="non-primitive" svg:viewBox="0 0 21600 21600" draw:enhanced-path="M 0 0 L 21600 0 21600 21600 0 21600 Z N"/></draw:custom-shape></text:p>
      <text:p text:style-name="Standard"/>
      <text:p text:style-name="Standard">So, why should you care about your life?</text:p>
      <text:p text:style-name="Standard"/>
      <text:p text:style-name="Standard"><text:span text:style-name="T287">Because it affirms truth, but that is a valid reason rather than a value-based demand.</text:span></text:p>
      <text:p text:style-name="P288"/>
      <text:p text:style-name="Standard"><draw:custom-shape svg:x="0in" svg:y="0in" svg:width="0.00069in" svg:height="0.02083in" draw:id="id2" draw:style-name="a2" draw:name="Rectangle 2144900513" text:anchor-type="as-char"><svg:title/><svg:desc/><text:p text:style-name="Normal"/><draw:enhanced-geometry draw:type="non-primitive" svg:viewBox="0 0 21600 21600" draw:enhanced-path="M 0 0 L 21600 0 21600 21600 0 21600 Z N"/></draw:custom-shape></text:p>
      <text:p text:style-name="Standard"/>
      <text:p text:style-name="Standard"><text:span text:style-name="T289">A brief note about “caring”</text:span>:</text:p>
      <text:p text:style-name="Standard">To care about the truth — not for this or that particular case but as such — is not to simply seek accuracy, but to seek it continually and consistently. If you do care about the truth this way, you would have to care about the fact that this engagement demands the sustenance of the one who is engaging. And if you care about truth only in a limited way, for a limited time, then it was nice knowing you, goodbye. Just do not get between me and my romance with the truth. My arguments here are not to convince those who do not want to live, but to clarify the validity of the position of those who do. I love truth, and it is true love, goddamnit!</text:p>
      <text:p text:style-name="Standard"/>
      <text:p text:style-name="Standard"><text:span text:style-name="T290">A brief note about why caring about existence is non-arbitrary</text:span>:</text:p>
      <text:p text:style-name="Standard">To be arbitrary is to be detached from the affirmation of fact. Caring about existence is precisely the opposite approach, taken forward in a committed way. But there is still something lurking here: why prefer non-arbitrary choices? To this, I say this: I am not saying you must prefer them. But if you are asking about purpose, seeking reasons, engaging in philosophical inquiry, you are already demonstrating a preference for non-arbitrary thinking. The question answers itself through its asking. Anyone asking “what should I do?” or “what's the purpose?” is already seeking fact-based guidance rather than pure whim. They have already implicitly rejected pure arbitrariness by the very act of inquiry.</text:p>
      <text:p text:style-name="Standard"/>
      <text:h text:style-name="P291" text:outline-level="1"><text:bookmark-start text:name="_t0gf8ujz2p2d"/><text:bookmark-end text:name="_t0gf8ujz2p2d"/><text:soft-page-break/>Vulnerability, Value &amp; Effort</text:h>
      <text:p text:style-name="P292"/>
      <text:p text:style-name="Standard"><text:span text:style-name="T293">NOTE</text:span><text:span text:style-name="T294">:<text:s/></text:span><text:span text:style-name="T295">Roughly speaking, Risk = Magnitude<text:s/></text:span><text:span text:style-name="T296">x</text:span><text:span text:style-name="T297"><text:s/>Probability.</text:span></text:p>
      <text:h text:style-name="Heading2" text:outline-level="2"><text:bookmark-start text:name="_jwf3da6fpwws"/><text:bookmark-end text:name="_jwf3da6fpwws"/>Vulnerability of Valuing</text:h>
      <text:p text:style-name="Standard"><text:span text:style-name="T298">To value something is to act to gain and/or keep it. This act, for a consciously-chosen value, is a volitional act, i.e. a choice. Choice is made amid the possibility of failure; if there was no such possibility, there would be no choice to act for or against the value, since the achievement of the value is inevitable regardless of one’s choice of actions. Now, note that value is not an abstract existent but ultimately a concrete and concretely experienced entity, event or state of existence. Such concrete experience is ultimately tied to the direct experience of conscious states, i.e. emotions and states of mind. The existence of a value presupposes an orientation, ultimately experienced concretely, e.g. through desire, fear, etc., toward one kind of existential state, with other kinds either devoid of affirmation or actively opposed by this orientation.</text:span></text:p>
      <text:p text:style-name="P299"/>
      <text:p text:style-name="Standard"><text:span text:style-name="T300">To put all these points together, to pursue a value is to open your conscious existence to the possibility of failure, which involves the concrete experience of this failure, such as disappointment, desperation, dejection and despair. The same applies for hope, which is the belief in a potential achievement of one or more values. In other words, to value is to be vulnerable to pain, hurt and heartfelt loss.</text:span></text:p>
      <text:p text:style-name="P301"/>
      <text:p text:style-name="Standard"><text:span text:style-name="T302">Furthermore, since values are contingent and many things we value are subject to eventual deterioration and destruction, e.g. other people, health, etc., there are acts of valuing that will, eventually, lead to some form of suffering, regardless of one’s choices. Yet, to value existence and one’s place in it is to choose anyway, and, to whatever degree is feasible to me, try to mitigate or even reverse deterioration and destruction.</text:span></text:p>
      <text:p text:style-name="P303"/>
      <text:p text:style-name="Standard"><text:span text:style-name="T304">In this light, it is understandable why a number of philosophies, from Buddhism to Stoicism to the idea of Dharma (as in the Bhagavat Gita) to the idea of Moksha in Hinduism, actively idealise a duty-based often ascetic life that tries to detach you and your actions from their results as well as the value of these results to you. This pursuit of what may be described variously as apathy, indifference, detachment or “freedom”, is certainly tempting in the face of the sheer complexity of the world, cosmic indifference and the existence of a large number of hostile forces that exceed the capacity of many to often even understand, let alone tackle. It does seem that the heights of hope are always positioned over the depths of despair, depths that seem all too easy to fall into when every inch of height is earned by fortune or effort.</text:span></text:p>
      <text:p text:style-name="P305"/>
      <text:p text:style-name="Standard"><text:span text:style-name="T306">Yet, such philosophies are, at their core, vicious, as they turn a living being against life itself while giving it the illusion of stability in its inherently unstable existence. I sympathise with those who are drawn to these philosophies — I was one of them, and in my own way, I gravitate to accepting despair as a default. However, by the nature of valuing itself, we see that such philosophies, when practiced in earnest, destroy the very act of valuing itself.</text:span></text:p>
      <text:p text:style-name="P307"/>
      <text:p text:style-name="Standard"><text:span text:style-name="T308">For instance, you cannot love if you are not willing to risk trusting the other person, and the deeper the love, the greater the trust and the greater the potential for harm, physical, psychological or practical. Yet, to try to detach oneself from the object of one’s love involves treating the loved one as ultimately insignificant to one’s state of being, which destroys the love. I mean, it is not necessarily wrong to hold another’s place in one’s life as insignificant, but this is certainly not conducive to actively caring for them and valuing their place in your life. Similarly, you cannot aspire, e.g. professionally, if you are not willing to risk dejection or disappointment. You can prepare for backups and contingencies, but motivation, effort, resources and time are limited, and it always becomes a tradeoff between investing in the aspiration and investing in backups and contingencies, and ultimately, maximising risk-aversion or inculcating an indifference to the aspiration destroys the motivation — the fuel and fire — behind the aspiration itself.</text:span></text:p>
      <text:h text:style-name="Heading2" text:outline-level="2"><text:bookmark-start text:name="_20ttcl82s0nq"/><text:bookmark-end text:name="_20ttcl82s0nq"/>Valuing is a Constant Effort</text:h>
      <text:p text:style-name="Standard"><text:span text:style-name="T309">Hence, we see that to value is to act constantly — i.e. consistently and repeatedly — toward one or more goals amid the risk of failure. Nothing existentially guaranteed is a value, and therefore, nothing valuable is existentially guaranteed, neither life, nor reward, nor justice, nor love.</text:span></text:p>
      <text:h text:style-name="Heading2" text:outline-level="2"><text:bookmark-start text:name="_l06ahpqisita"/><text:bookmark-end text:name="_l06ahpqisita"/>What Does this Mean in Practice?</text:h>
      <text:p text:style-name="Standard"><text:span text:style-name="T310">In practice, it means that to claim anything to be of value carries an inherent risk of pain, hurt, failure and loss. It is key to note here that not every risk is worth taking, since not every goal or outcome is valuable, or at least not valuable after a certain point. Some value-claims may have lesser risk, but this is because the value itself is either not significant to your life (even if it is easy to achieve, it can be significant, in which case the risk is great due to the immense magnitude of loss rather than a high probability; e.g. air, water, food). The more significant a value or potential value, the greater the risk it carries, and the more effort one must place in understanding its worth and, if indeed worthy, the way to achieve it, sustain it and deal with its loss (again, balancing pursuit and contingency based on how urgent and important the value or potential value is).</text:span></text:p>
      <text:p text:style-name="P311"/>
      <text:p text:style-name="Standard"><text:span text:style-name="T312">Specifically, it means loving another person, aspiring to a professional goal, setting personal milestones, etc. are significant decisions that carry immense weight not only in their importance but in the risk of pain, hurt, failure and loss. Hence, it serves to be thoughtful to fix one’s conviction, have a strong conviction where possible and be committed to do justice to one’s conviction.</text:span></text:p>
      <text:p text:style-name="P313"/>
      <text:h text:style-name="P314" text:outline-level="1"><text:bookmark-start text:name="_uov15rexldpy"/><text:bookmark-end text:name="_uov15rexldpy"/><text:soft-page-break/>Virtue &amp; Internalised Premises</text:h>
      <text:p text:style-name="Standard">Moral virtue is fundamentally an exercise of choice. However, what about tendencies, inclinations and actions we make almost instinctively, as a second nature? How does that reflect on our virtue, moral character and beliefs? Here, I would like to distinguish between 2 kinds of beliefs. The first is the usual kind, i.e. holding an idea/view/value to be true or good on a cognitive level, i.e. consciously grasping and affirming it. The second kind is the implied views/values of our tendencies, inclinations, motivations and so-called instinctive actions/responses. For example, one may believe in gender-equality but may still expect his working wife to do a much larger share of the household work. As another example, one may reject superstitions and ritualistic practices for ensuring future outcomes, but may still engage with it out of an innate fear or hope when in trouble. As another example, one may morally condemn rape and sexual violence while still being aroused by scenarios/descriptions of it. What do these prove?</text:p>
      <text:p text:style-name="Standard"/>
      <text:p text:style-name="Standard">If moral virtue is fundamentally an exercise of choice, and if (as I hold) internalisation of premises and the products of it are ultimately subjectable to examination, change and/or reliable self-control (not in the sense of repression without a reliable way to contain/channel the growing desires/motivations), then I hold that such internalised premises do not necessarily reflect vice or a lack of virtue, but not examining them when they are relevant to your life and how you treat people is a vice. In other words, we must be both generous and uncompromising: yes, your internalised premises may not be your fault, but they are your responsibility and you must treat them as such. A person who holds repressed resentment against his friend and releases it in an unreasonable outburst should be held accountable, but he should not consider this resentment as a reflection of his “true” views about his friend, just a reflection about certain views that need to be examined and validated. As another example, because you have an instinctual prejudice against female art (e.g. judging them as less creative once you know they are female-made) does not mean your “true” views on women are that they are inherently less worthy of admiration, but rather, that you need to examine the harmful premises you may have unconsciously adopted.<text:s/><text:span text:style-name="T315">It is not necessarily your fault, but it is your responsibility</text:span>.</text:p>
      <text:p text:style-name="Standard"/>
      <text:p text:style-name="Standard">Virtue and moral character lies in the willingness to examine one’s premises, internalised or not, and exercise choice over them. Virtue is not about having perfect premises to begin with, but caring about your premises and your rational-emotional integrity. Finally, note that “caring” is not simply a pursuit or effort, but something that actually achieves something. The journey is important, but the destination matters and is what makes the journey matter, and satisfying yourself that you are going on the journey without being keen to reach the destination leads to a moral contradiction: caring about reaching and practicing the right premises, without caring about acquiring<text:s/><text:soft-page-break/>these premises and internalising them. Effort is important, but it must be an effective effort. The journey in this case is a means to an end, not an end in itself, and reaching the end is a matter of life-and-death, epistemologically and ethically. In other words, you must aim to achieve the end to your best capacity within your context and hierarchy of values; anything less is willful harm/avoidance of the good, which is immoral.</text:p>
      <text:p text:style-name="Standard"/>
      <text:p text:style-name="Standard"><text:span text:style-name="T316">SIDE NOTE</text:span>:<text:s/><text:span text:style-name="T317">Do not overgeneralise this idea. Sometimes, the journey is the point or the more important part of the whole. But not here. Contextual clarity is important.</text:span></text:p>
      <text:p text:style-name="P318"/>
      <text:h text:style-name="P319" text:outline-level="1"><text:bookmark-start text:name="_x8r0zqvcuoz1"/><text:bookmark-end text:name="_x8r0zqvcuoz1"/><text:soft-page-break/>Ends &amp; Means, Values &amp; Virtues</text:h>
      <text:p text:style-name="Standard">Values are the ends to which we orient ourselves, and since they are the final cause (in Aristotelian terms) of our volitional actions, with the efficient cause being our volition and its attached apparatus, values are the consideration that comes before any discussion of means. In other words, the ends set the framework within which means can be considered. Virtues are modes of action that are aligned to the achievement of values. Thus, the cultivation of virtues is derivative to the recognition of values, and not addressing values deprives the pursuit of virtues of any meaning and thereby any motivation. This, I believe, was a key factor in my inability to maintain certain lifestyle changes, e.g. exercise, study, engagement, because these changes soon became about cultivating virtue without keeping the values in mind. I do not essentially want to “be engaged”; this is a virtue to help me actually gain the value of concrete experience. I do not essentially want to “be disciplined”; this is a virtue to help me actually gain the value of consistent efforts long-range.</text:p>
      <text:h text:style-name="P320" text:outline-level="1"><text:bookmark-start text:name="_qkjko9yvvybc"/><text:bookmark-end text:name="_qkjko9yvvybc"/><text:soft-page-break/>Honour</text:h>
      <text:p text:style-name="Standard">Honour is a multi-faceted word that encompasses a number of distinct concepts. Here, I shall focus on honour as a strictly moral concept, i.e. honour as tied to one’s respect of values, cultivation of virtues and commitment to integrity. However, these aspects — respect of values, cultivation of virtues, commitment to integrity — lead to self-esteem, i.e. regarding oneself as virtuous and aligned in thought and action with one’s own values. Is this honour?</text:p>
      <text:p text:style-name="Standard"/>
      <text:p text:style-name="Standard">The concept of honour reflects not solely one’s own actions but one’s actions in relation to other people. A man can have self-esteem on a desert island but not honour, because honour is primarily an interpersonal concept, or more precisely, the reflection of one’s self-esteem in interpersonal contexts. The importance of the concept of honour is in identifying the reflection — or lack thereof — of moral character in social contexts, both in one’s own actions toward others and in others’ actions toward oneself (“action” includes “recognition” here). In short, honour is virtue made visible and validated in a social context — crucially, the absence of this visibility and validation does not imply the absence of virtue, and conversely, the presence of the former does not imply the presence of the latter. This shall be further clarified in the following discussion, and the implications of this fact shall be outlined at the end of this discussion.</text:p>
      <text:p text:style-name="Standard"/>
      <text:p text:style-name="Standard">Morality is objective in principle but contextual in practice, just like any law of nature: what it means stays the same in essence, but the specifics can vary greatly. For example, consider the moral principle of “not evading the facts”. If you are tired or cognitively overloaded, the most relevant fact that has major repercussions on your ability to think at all is this tiredness or overload, and addressing this by, say, distracting yourself or moving your mind away from your worries to relax is not evasion. However, when you are facing a deadline and need to make a decision that would affect you and your wellbeing/potential — e.g. which job offer to accept, or whether to prioritise studies or relationships, or whether to go on a vacation with friends, etc. — then distracting yourself or moving your mind away from your worries is most certainly a massive evasion of the facts.</text:p>
      <text:p text:style-name="Standard"/>
      <text:p text:style-name="Standard">The contextual nature of applied morality naturally extends to the concept of honour, which is a category of applied morality. In practice, however, since moral action and rational decision-making is primary, honour is — properly speaking — a by-product of one’s pursuit of values and virtues and not the goal of it, since honour simply denotes the fact of individual morality as it applies in an interpersonal context, not the method nor the motivation. Honour may, at best, point out what should or should not be done — e.g. standing by one’s promise, standing up for the reputation of someone we know, public appreciation of a brave soldier, rewarding of a groundbreaking scientist,<text:s/><text:soft-page-break/>recognition of a powerful writer, etc. — but honour does not tell you how or why you should be doing or not doing something. This may explain why certain so-called “honour cultures” degrade into such irrational and vile practices, e.g. honour killings, ritual suicide, duels to the death, etc. Honour detached from moral action and purpose, i.e. values and virtues, is an empty and potentially deleterious concept.</text:p>
      <text:p text:style-name="Standard"/>
      <text:p text:style-name="Standard">In conclusion, honour is like money in that it has value only with respect to what it stands for and has no independent worth. Like acquiring money by violating principles of sound economics and politics (e.g. violating the rights of others, expropriation and exploitation, abuse of natural resources, etc.), trying to acquire honour by violating principles of sound thought and action (e.g. by lying/cheating, pursuing arbitrary standards, pursuing achievement divorced from broader life-affirming value, etc.) gives you power in world made poor and pathetic by your actions. Do not honour your promises for honour’s sake but because they make sense and mean something to you and the one you made the promise to. Do not honour your parents for honour’s sake but because they enrich your life with their presence compounded by their past engagement.</text:p>
      <text:p text:style-name="P321"/>
      <text:h text:style-name="P322" text:outline-level="1"><text:bookmark-start text:name="_c3br4zv4dkkx"/><text:bookmark-end text:name="_c3br4zv4dkkx"/><text:soft-page-break/>Conviction</text:h>
      <text:h text:style-name="Heading2" text:outline-level="2"><text:bookmark-start text:name="_egs2nbktcgh5"/><text:bookmark-end text:name="_egs2nbktcgh5"/>Need of Absolute Conviction</text:h>
      <text:p text:style-name="Standard">Consciousness needs an apparatus to be effective; this apparatus includes the subconscious. The subconscious, to some degree, automates the process of perceiving that which exists and acting on its perception with respect to context (<text:span text:style-name="T323">cognitive, moral and situational</text:span>). Such automation is vital due to: (1) time and energy constraints (<text:span text:style-name="T324">automation handles them most efficiently)<text:s/></text:span>and (2) constraints of focus (<text:span text:style-name="T325">automation frees the focus for more mental units</text:span>). An illustrative analogy of the relationship between the conscious and the subconscious is the relationship between a programmer and a computer. The computer is far more powerful (in processing capacity) than the programmer, but the programmer needs to and is able to<text:s/><text:span text:style-name="T326">direct and shape</text:span><text:s/>the<text:s/><text:span text:style-name="T327">actions and behaviour</text:span><text:s/>of the computer through the use of the right method.</text:p>
      <text:p text:style-name="Standard"/>
      <text:p text:style-name="Standard"><text:span text:style-name="T328">NOTE</text:span>:<text:s/><text:span text:style-name="T329">Automation is more time and energy efficient than deliberation, but of course, deliberation has its own vital place in cognition and action. Time and energy efficiency does not mean efficiency as a whole, i.e. it does not necessarily mean keeping a low cost while maintaining the required effectiveness. To achieve efficiency as a whole (i.e. effectiveness with low cost) often requires deliberation too.</text:span></text:p>
      <text:p text:style-name="Standard"/>
      <text:p text:style-name="Standard">The vital role of the subconscious in one’s life means that the<text:s/><text:span text:style-name="T330">core values and principles<text:s/></text:span>one validates through reason<text:s/><text:span text:style-name="T331">must be internalised</text:span>, i.e. made a part of the subconscious. Internalisation is, in essence, the<text:s/><text:span text:style-name="T332">unquestioned<text:s/></text:span>acceptance (within some context) of the validity of an idea (ex. a value or principle). To question it is to bring it into conscious focus; this is vital in its own way, but is not practical (and often not even possible) to do in every case. Such unquestioned acceptance — i.e. absolute conviction — can have 3 sources: (1) faith (unquestioned acceptance from the start), (2) reason (<text:span text:style-name="T333">rigorous</text:span><text:s/>validation as the basis of unquestioned acceptance) and (3) self-evidence. The self-evident cannot be questioned by its nature, because even to question it would be to accept it, implicitly or explicitly (in this way, it can be shown what is or is not self-evident). In other words, the self-evident is unquestionable by its nature<text:s/><text:span text:style-name="T334">not due to forces trying to stop questions but due to the nature of its existence as such</text:span>. Hence, the self-evident is the basis of reason.</text:p>
      <text:p text:style-name="P335"/>
      <text:p text:style-name="Standard"><text:span text:style-name="T336">NOTE</text:span>:<text:s/><text:span text:style-name="T337">While the existence of the self-evident is inescapable because of the inescapable fact of existence itself, very few things are self-evident, and one must be scrupulous in deeming something to be self-evident.</text:span></text:p>
      <text:p text:style-name="Standard"/>
      <text:p text:style-name="Standard">A key aspect of rational consciousness is fallibility. Why? Reason is a faculty that must<text:s/><text:soft-page-break/>be exercised by volition and volition means the choice to focus (<text:span text:style-name="T338">integration—a key part of reason—is a result of focus</text:span>). But focus is finite, which means it does not always<text:s/><text:span text:style-name="T339">seek and hold</text:span><text:s/>all the parts of the necessary context. However, when focus can seek and hold all parts of the necessary context, reason can be validated so as to be unquestionable. Can such a case be identified? The answer yes, it can, through (1) the affirmation of the self-evident, (2) the affirmation of the aspects of the self-evident, and (3) the affirmation of the<text:s/><text:span text:style-name="T340">logical necessity</text:span><text:s/>of a relationship between the self-evident and another object of consideration (<text:span text:style-name="T341">note that the laws of logic are themselves the affirmation of the aspects of the self-evident, namely the fact of existence and the law of identity</text:span>).</text:p>
      <text:p text:style-name="P342"/>
      <text:p text:style-name="Standard"><text:span text:style-name="T343">NOTE</text:span>:<text:s/><text:span text:style-name="T344">Being fallible means not that certainty is impossible, only that certainty is not automatic.</text:span></text:p>
      <text:p text:style-name="Standard"/>
      <text:p text:style-name="Standard">If steps (1), (2) and (3) create the context, then this context is one wherein reason can be validated so as to be unquestionable<text:span text:style-name="T345">.</text:span><text:s/>Such is the case with metaphysical truths, the epistemological truths and the standard of value in ethics. Thus, once validated, these can and must be accepted<text:s/><text:span text:style-name="T346">unquestioned</text:span><text:s/>as if an article of faith. But why not use articles of faith? Because, as stated, volition and hence ability to know reality are finite and thus fallible, which means no article of faith is sure to be true to reality. But being true to reality is the way to deal with it to achieve ends within it; thus,<text:s/><text:span text:style-name="T347">the use of faith over reason is unconscionable in its recklessness — you leave your ability to deal with reality entirely to chance (which may or may not favour you)</text:span>. Hence, the unquestioned acceptance and thus the absolute conviction found in faith is vital to human life (especially long-range); the issue is not unquestioned acceptance but its source —<text:s/><text:span text:style-name="T348">is it the self-evident and the rational or the arbitrary?</text:span></text:p>
      <text:h text:style-name="Heading2" text:outline-level="2"><text:bookmark-start text:name="_akdubwgwilwk"/><text:bookmark-end text:name="_akdubwgwilwk"/>The Danger of Non-Absolutism</text:h>
      <text:p text:style-name="Standard">Note that introducing doubt without reason (e.g. by professing uncertainty when certainty is possible and proper) undermines the internalisation of valid notions, thus undermining your ability to act, especially when in pressure, hardship or distress. To put it in other words, a non-absolute conviction is necessarily a wavering conviction on some level, and a wavering conviction is not a firm basis for confidence or courage and in fact undermines them on some level;<text:s/><text:span text:style-name="T349">this is only valuable if there is a rational basis for doubt or a lack of rational basis for certainty</text:span>. But if certainty is achieved or achievable<text:s/><text:span text:style-name="T350">in the given context</text:span>, leaving your conviction wavering undermines your pursuit of life on some level because<text:s/><text:span text:style-name="T351">rationally earned</text:span><text:s/>confidence and courage — which cannot be reached with a wavering conviction — are vital in pursuing, upholding and defending one’s values effectively and consistently.</text:p>
      <text:p text:style-name="Standard"/>
      <text:p text:style-name="Standard"><text:span text:style-name="T352">NOTE</text:span>:<text:s/><text:span text:style-name="T353">Motivation is based on one’s internalised premises; shaky premises lead to<text:s/></text:span><text:soft-page-break/><text:span text:style-name="T354">shaky motivations that would be too weak to withstand challenges and adversity beyond a certain point. Hence, certainty is the basis for persevering motivation and thereby confidence, courage and one’s ultimately one’s pursuit of values.</text:span></text:p>
      <text:h text:style-name="Heading2" text:outline-level="2"><text:bookmark-start text:name="_23hz32eemmzg"/><text:bookmark-end text:name="_23hz32eemmzg"/>The Danger of Irrational Absolutism</text:h>
      <text:p text:style-name="Standard">Whatever you profess, if you internalise a notion to the point of it being automatic, you — in practice — accept it as an absolute. Hence, the question is not whether to accept absolute but what absolutes to accept. Note that if what you call “confidence” or “courage” are irrational, i.e. not based on one’s rational judgement of the facts, then they are dangerous to oneself and others<text:s/><text:span text:style-name="T355">in principle</text:span>, possibly to the point of being suicidal; in such a case, “confidence” is in fact presumptuousness or arrogance, while “courage” is in fact recklessness or foolhardiness.</text:p>
      <text:h text:style-name="Heading2" text:outline-level="2"><text:bookmark-start text:name="_eqow813mp830"/><text:bookmark-end text:name="_eqow813mp830"/>“Threats” to Conviction</text:h>
      <text:p text:style-name="Standard">A conviction can only be under “threat” (from the perspective of the one holding the conviction) if one senses or feels that one’s efficacy in reality would be diminished, degraded or destroyed if one’s convictions were challenged. However, in my view, such a fear betrays an evasiveness at the root of one’s convictions, because only an evasion requires that it not be challenged in order to be sustained; reality is the evasive mind’s greatest antagonist. On the other hand, a conviction drawn from a rational grasp of reality cannot be threatened by opposing views because reality is what it is as an absolute and reason is the valid means of knowing it. Only a scrupulously, fundamentally rational view cannot be threatened, and only a person with reason as his absolute can explore opposing views without fearing the destruction of the ground beneath his feet.</text:p>
      <text:h text:style-name="P356" text:outline-level="1"><text:bookmark-start text:name="_1s8f9ip7xngt"/><text:bookmark-end text:name="_1s8f9ip7xngt"/><text:soft-page-break/>Rationality &amp; Intelligence</text:h>
      <text:p text:style-name="Standard">The development of religious/theological thought across the centuries is nothing short of fascinating. Consider the sheer absurdity and diversity of views and arguments. Many appeal to God’s plans as being all-encompassing and beyond human comprehension, while also maintaining the view that moral choice is a choice, contingent on the individual’s free-will (whence does free-will come if everything is a part of God’s plan?). Some, like Saint Augustine, try to frame knowledge of the divine as insights granted by the grace of God, insights we can make sense of at times but may not always succeed in doing so. Others, like Tertullian, openly flaunt the irrationality or a-rationality of their faith (“I believe because it is absurd”). Moving to other traditions, we have views of the material world as being essentially a reflection — often a poor reflection — of “true” reality, framing material concerns as self-deceptive and meaningless (one proposed answer to the existence of evil, in certain Neoplatonic arguments, is that evil is simply the lack/absence of the light from which everything arises (this light could be God or some other power), which at once tries to absolve the divine of responsibility for evil while explaining its existence). We also have ideas that try to detach moral action from reward (appealing to a sort of determinism), which underpin certain Hindu and Stoic philosophy.</text:p>
      <text:p text:style-name="Standard"/>
      <text:p text:style-name="Standard">Now, also consider views on human dignity and rights. Aristotle, the father of logic himself, argued for “natural slaves” and the inferiority of the personhood of women. Brilliant scholars have existed in deeply religious societies, not just contributing to science, medicine and mathematics, but also being supported often by the authorities that sustained such societies. Thomas Hobbes argued that any form of authority that takes us away from the “state of nature” is worth adhering to due to the brutal anarchy of the “state of nature”. It was only John Locke who first articulated the concept of human rights, a concept that even today is misunderstood (e.g. “right to education”) or ignored/rejected (look at the various openly authoritarian and/or regressive countries today).</text:p>
      <text:p text:style-name="Standard"/>
      <text:p text:style-name="Standard">I shall cease this enumeration here, because these views are not my main focus for this essay. Instead, I want to use these views to highlight an important fact: these are not necessarily views of stupid or ignorant people. In fact, judging by the sophistication of the abstractions and argumentation, these were and are often intelligent or even brilliant people. Moreover, those who hold irrational views do not necessarily do so out of spite, malice or thoughtlessness. If the scale and scope of the writings shows us anything, and if the community-spirit and flourishing of countless religious and regressive people across history and across the world is to be taken into account, we get a picture not of mindless savages or anti-rational mystics (at least not always), but of people arriving at conclusions, often consciously, and trying to live by them, often sincerely. As much as I<text:s/><text:soft-page-break/>despise religions, I have had religious friends I have cherished in my life, and who are genuine, value-oriented people (a lot of whom are happier and more successful than me).</text:p>
      <text:p text:style-name="Standard"/>
      <text:p text:style-name="Standard">Hence, coming to the thesis of this essay, I want to put forward a very important distinction with regards to judging people and ideas. Intelligence and rationality are 2 separate attributes, not unrelated, but not tightly coupled. An unintelligent person can be supremely rational as long as they have conceptual ability and self-control. An intelligent person can be deeply irrational in their views, their intelligence often serving to strengthen their rationalisations. In this light, irrational religious or moral doctrines are not necessarily “stupid”, i.e. they may involve a high level of abstraction in their framework, along with careful, compelling argumentation on many levels of abstraction. This is crucial, because in dismissing such views as “stupid”, we fail to see their actual intellectual power and allure, thereby failing to properly combat these views convincingly.</text:p>
      <text:p text:style-name="Standard"/>
      <text:p text:style-name="Standard">The core reason for this separation is the distinction in purpose. Intelligence is a capacity. Rationality, however, is an epistemological commitment, a commitment specifically to the evidence of the senses, the laws of logic and the various principles we may discover through this evidence and logic for induction, evidence-evaluation, etc. Thus, we see that rationality involves choice.</text:p>
      <text:h text:style-name="P357" text:outline-level="1"><text:bookmark-start text:name="_lpeqxhx8iby4"/><text:bookmark-end text:name="_lpeqxhx8iby4"/><text:soft-page-break/>On “Being Intelligent”</text:h>
      <text:h text:style-name="Heading2" text:outline-level="2"><text:bookmark-start text:name="_nvsfk0i6phei"/><text:bookmark-end text:name="_nvsfk0i6phei"/>Performing Intelligence</text:h>
      <text:p text:style-name="Standard">Let me define the term as used here: “being intelligent” here refers to the considerations, actions and behaviours one has and/or takes up which contribute — intentionally or otherwise — to the external (or imagined external) perception of one’s intelligence. Now, note that intelligence can itself be defined in multiple ways, e.g. the capacity to deal with abstractions, problem-solving ability (which again varies greatly depending on the problem types, perceptiveness, intuitive accuracy, skill and presence of mind, etc.). This should already alert you to the pitfalls of caring excessively of being perceived as intelligent — not only is it impractical, it is also ill-defined in general terms. Nonetheless, let us engage with this worry with epistemological rigour.</text:p>
      <text:p text:style-name="Standard"/>
      <text:p text:style-name="Standard">Let me get to the core of the issue right away, drawing from the principles laid out in<text:s/><text:a xlink:href="https://mistermilvusmigrans.github.io/philosophy/epistemology/rationality-in-practice/5-principles-for-rationality-in-practice.html" office:target-frame-name="_top" xlink:show="replace"><text:span text:style-name="T358">Principles for Rationality in Practice (Rationality in Practice, Epistemology, Philosophy,<text:s/></text:span></text:a><text:a xlink:href="http://mistermilvusmigrans.github.io" office:target-frame-name="_top" xlink:show="replace"><text:span text:style-name="T359">mistermilvusmigrans</text:span></text:a><text:a xlink:href="http://mistermilvusmigrans.github.io" office:target-frame-name="_top" xlink:show="replace"><text:span text:style-name="T360">.github.io</text:span></text:a><text:a xlink:href="https://pranav-gopalkrishna.github.io/philosophy/epistemology/rationality-in-practice/5-principles-for-rationality-in-practice.html" office:target-frame-name="_top" xlink:show="replace"><text:span text:style-name="T361">)</text:span></text:a>, specifically the principle of essentialisation, which states that<text:s/><text:span text:style-name="T362">essentials (i.e. thinking in and acting on essentials) are indispensable to consistent rationality. The first sub-principle within this that I want to draw upon is the principle of essentials-first, which is the principle of keeping one’s focus on seeking the essentials rather than dismissing the non-essentials (</text:span><text:span text:style-name="T363">note here that dismissing non-essentials is a valid approach but only as secondary to seeking the essentials. In other words, if you have reason to consider something as potentially essential and relevant for the given context and purpose, then it is valid to check if it is indeed so or if it is a non-essential to be dismissed</text:span><text:span text:style-name="T364">). What we know to be essential in life is the act of staying in focus of what we know and expanding non-arbitrarily, i.e. with respect to our context and our purpose (and the purpose itself must be non-arbitrary, ultimately tied to simply the purpose of sustaining one’s existence as a volitional being, i.e. one’s alive, aware and self-driven existence). To this end, being clear about our purposes and seeking knowledge accordingly is essential. What is not essential is “being intelligent”, since intelligence is only useful instrumentally, not inherently, and instrumentally, the part of intelligence that serves us best is the part focused on reality and not fixated on self-affirmation. Moreover, self-affirmation on its own is an arbitrary goal, unless within our context to our pursuit of life in a well-defined way (e.g. to prove performance/competence to a superior at work or for an interview).</text:span></text:p>
      <text:p text:style-name="P365"/>
      <text:p text:style-name="Standard"><text:span text:style-name="T366">The next 2 principles are related. First is the principle of knowledge-orientation (i.e. making considerations rooted in knowledge rather than ignorance, where you should note that a cognitively purposeful consideration in ignorance presupposes consideration in knowledge; even probability is based on knowledge about the gaps in our knowledge,<text:s/></text:span><text:soft-page-break/><text:span text:style-name="T367">for which knowledge must exist to begin with). In the given context, what we know is what we focus on, keep in our mind or bring to our mind based on the context we are aware of at the moment. Furthermore, self-affirmation of intelligence is not inherently tied to rational pursuits (and is often detrimental when it takes focus away from the task/situation at hand, e.g. when learning a new skill (where we are exploring a lot of unknown territory with limited in-built competence), dealing with an emergency or trying to engage with something/someone in the moment), which means self-affirmation of intelligence is by no means a “known value” in the given context, and its value is highly contingent on specifics that are not widespread. What we know — the importance of one’s focus on reality — is what takes precedence in our thoughts and actions.</text:span></text:p>
      <text:p text:style-name="P368"/>
      <text:p text:style-name="Standard"><text:span text:style-name="T369">Second is the principle of unaccountability: what cannot be taken into account in your current context should not be taken into account. This is because (drawing directly from the essay on principles of rationality in practice linked at the top of this article) if it cannot be taken into account, then no mental effort toward it has purpose, which means it has no relevance in the given context. Rationality demands relevance, hence the aforementioned principle. To expand on the principle, something cannot be taken into account if (1) it violates the constraints (of time, effort or resources) with respect to one’s hierarchy of values or (2) it is based on considerations that have no basis in knowledge, i.e. it is based on considerations primarily in ignorance. In case (1), putting time, effort and resources to try to account for something that takes away time, effort and resources from something known to be more relevant is acting against one’s awareness of reality, i.e. acting arbitrarily and hence primarily in ignorance. In case (2), it is more obvious that the action taken would be primarily in ignorance. In both cases, one’s indifference to reality is stronger than one’s affirmation of it, leading to an approach that ultimately denies one’s awareness and thereby one’s existence. Applied to “being intelligent”, it is clear that as such, when the context does not clearly require it in well-defined ways, we cannot take into account the importance of the effect of being perceived or not being perceived as intelligent, and we often cannot even take into account what effect it would actually have, since intelligence and its evaluation is multi-dimensional and not often based on momentary judgements. Furthermore, its relevance is often more than dubious in such cases; indeed, it is often simply irrelevant.</text:span></text:p>
      <text:p text:style-name="P370"/>
      <text:p text:style-name="Standard"><text:span text:style-name="T371">Lastly, I want to draw attention to the fact that it is more beneficial for your own intelligence in practice (and, generally, in external perception) when you actually focus on reality purposefully rather than worry about how intelligent you appear, since intelligence is reflected in efficacy in dealing with reality — airs of intelligence detached from such efficacy would certainly come across as affectation, I would bet on this. In this way, “being intelligent” is like “being happy”: it happens as a welcome consequence, but cannot be the rational goal. Just like “being happy” is meaningless in and of itself, since<text:s/></text:span><text:soft-page-break/><text:span text:style-name="T372">what matters is focusing on living efficiently and engaging with one’s interests, with the form of happiness following the form of your practices and pursuits, “being intelligent” is meaningless in and of itself, since what matters is focusing on and engaging with reality purposefully and consciously, with the form of intelligence (and its external perception) following the form of your practices and pursuits. Moreover, fixating on arbitrary standards — be it for happiness or intelligence — detached from these primary pursuits are potentially deleterious for these primary pursuits, because it tries to reverse action and expression, essentially trying to reverse cause and effect. In the end of the day, whether you are “happy” or “intelligent” according to some external perception is good if and only if it is aligned with your more essential pursuits, and while welcome, such external perception’s lack does not prove anything about the worth of your pursuits or your ability to engage with them. It is true that external recognition is a strong reinforcement, often, but it is at best a reinforcement and not an essential proof or driver.</text:span></text:p>
      <text:h text:style-name="Heading2" text:outline-level="2"><text:bookmark-start text:name="_etwd69zdmfhy"/><text:bookmark-end text:name="_etwd69zdmfhy"/>What Counts as Purposeful Engagement with Reality?</text:h>
      <text:p text:style-name="Standard">The answer is as follows:</text:p>
      <text:list text:style-name="WWNum5">
        <text:list-item>
          <text:p text:style-name="P373">Take the evidence of your senses</text:p>
        </text:list-item>
        <text:list-item>
          <text:p text:style-name="P374">Identify facts conceptually in your context</text:p>
        </text:list-item>
        <text:list-item>
          <text:p text:style-name="P375">Identify causal relationships in your context</text:p>
        </text:list-item>
        <text:list-item>
          <text:p text:style-name="P376">Reflect on your goals:</text:p>
          <text:list text:continue-numbering="true">
            <text:list-item>
              <text:p text:style-name="P377">Starting from basic awareness</text:p>
            </text:list-item>
            <text:list-item>
              <text:p text:style-name="P378">Moving to basic nutritive/survival goals</text:p>
            </text:list-item>
            <text:list-item>
              <text:p text:style-name="P379">Expanding outward based on new insights from the identification</text:p>
            </text:list-item>
          </text:list>
        </text:list-item>
      </text:list>
      <text:p text:style-name="Standard"/>
      <text:p text:style-name="Standard">This is a constant, highly individual process, but the way to navigate your individual context is laid out in a continuous process of identification, reflection and integration, as stated above. For more insights into the principles of rational engagement, see:</text:p>
      <text:p text:style-name="Standard"><text:a xlink:href="https://mistermilvusmigrans.github.io/philosophy/epistemology/rationality-in-practice/5-principles-for-rationality-in-practice.html" office:target-frame-name="_top" xlink:show="replace"><text:span text:style-name="T380">Principles for Rationality in Practice (Rationality in Practice, Epistemology, Philosophy,<text:s/></text:span></text:a><text:a xlink:href="http://mistermilvusmigrans.github.io" office:target-frame-name="_top" xlink:show="replace"><text:span text:style-name="T381">mistermilvusmigrans</text:span></text:a><text:a xlink:href="http://mistermilvusmigrans.github.io" office:target-frame-name="_top" xlink:show="replace"><text:span text:style-name="T382">.github.io</text:span></text:a><text:a xlink:href="https://pranav-gopalkrishna.github.io/philosophy/epistemology/rationality-in-practice/5-principles-for-rationality-in-practice.html" office:target-frame-name="_top" xlink:show="replace"><text:span text:style-name="T383">)</text:span></text:a></text:p>
      <text:h text:style-name="Heading2" text:outline-level="2"><text:bookmark-start text:name="_8g9u79f6sfds"/><text:bookmark-end text:name="_8g9u79f6sfds"/>Rational Performance of Intelligence</text:h>
      <text:p text:style-name="Standard">Simply put, if you can define the form of intelligence and the purpose of demonstrating it in the given context, it is simply one’s rational application of focus applied to the given context purposefully, and it just so happens to involve a performance of intelligence. For example, in an interview for a job, the goals may not always be clear, but the broad idea is: show your interest, competence for the role (which is specific in scope) and willingness to learn. Likewise, when meeting a client, performing intelligence is important to establish trust, and in particular, the intelligence here is about knowing the<text:s/><text:soft-page-break/>client’s needs/being receptive to them, knowing your own domain and potential applications of your skills, etc. Even if the parameters are broad, they can still be well-defined in scope and purpose. In such a case, performing intelligence is absolutely valid and even important. However, not how such a performance is instrumental for your goals and not an end in itself or simply for recognition/external perception — you want the job, or the business deal, or the credibility, etc.</text:p>
      <text:p text:style-name="Standard"/>
      <text:p text:style-name="Standard">The problem in desiring external perception of your intelligence has already been explained in the first part of this article: ill-defined scope and ill-defined importance to your purposes leads to arbitrary decision-making and considerations, which in turn hog your cognitive capabilities and your very ability to engage with the facts facing you. Your alertness, perceptiveness, situation-readiness — these are all compromised in such a pursuit. I am not saying, “Do not desire external perception.” I am only asking you to ask yourself if it truly matters and if it is something you can truly take into account, with a well-defined scope and clear purpose that ties to your broader purposes.</text:p>
      <text:p text:style-name="Standard"/>
      <text:p text:style-name="Standard">In summary:</text:p>
      <text:p text:style-name="Standard"/>
      <text:p text:style-name="Standard">When your concern about appearing intelligent is:</text:p>
      <text:list text:style-name="WWNum2">
        <text:list-item>
          <text:p text:style-name="P384">Downstream from your actual goals</text:p>
        </text:list-item>
        <text:list-item>
          <text:p text:style-name="P385">Bounded by specific contexts</text:p>
        </text:list-item>
        <text:list-item>
          <text:p text:style-name="P386">Defined by concrete parameters</text:p>
        </text:list-item>
        <text:list-item>
          <text:p text:style-name="P387">Instrumental to purposes you can articulate</text:p>
        </text:list-item>
      </text:list>
      <text:p text:style-name="Standard">… then it is rational and important.</text:p>
      <text:p text:style-name="Standard">When it's:</text:p>
      <text:list text:style-name="WWNum4">
        <text:list-item>
          <text:p text:style-name="P388">Upstream from everything else (a constant background anxiety)</text:p>
        </text:list-item>
        <text:list-item>
          <text:p text:style-name="P389">Unbounded (pervading all interactions)</text:p>
        </text:list-item>
        <text:list-item>
          <text:p text:style-name="P390">Vague (general desire to seem smart)</text:p>
        </text:list-item>
        <text:list-item>
          <text:p text:style-name="P391">An end in itself (seeking validation rather than serving defined purposes)</text:p>
        </text:list-item>
      </text:list>
      <text:p text:style-name="Standard">… then it is irrational and debilitating.</text:p>
      <text:p text:style-name="Standard"/>
      <text:h text:style-name="P392" text:outline-level="1"><text:bookmark-start text:name="_dim8qrw8kamu"/><text:bookmark-end text:name="_dim8qrw8kamu"/><text:soft-page-break/>Ideas: A Matter of Life &amp; Death</text:h>
      <text:h text:style-name="Heading2" text:outline-level="2"><text:bookmark-start text:name="_yfpfm2ftlc04"/><text:bookmark-end text:name="_yfpfm2ftlc04"/>Action, Goals, Values and Ideas</text:h>
      <text:p text:style-name="Standard">Through action, we shape ourselves and the world around us. A coal miner extracts coal, which serves as a fuel for heat and mechanised power. A mason arranges the bricks, cement and other raw material into a place that shelters people from the effects of the elements — cold, heat, wind, etc. A mother raises a child, ensuring its survival, learning and eventual entry into personhood, thereby being and becoming a new actor in the world.</text:p>
      <text:p text:style-name="Standard"/>
      <text:p text:style-name="Standard">For a living being, but especially for human beings, every conscious action is for something; this is how we act not just as causal factors but as causal agents, not simply reacting but acting toward a potential we recognise and strive to realise and often succeed in realising. Actions shape ourselves and the world around us, and goals shape the actions we take.</text:p>
      <text:p text:style-name="Standard"/>
      <text:p text:style-name="Standard">A goal is for some state or object, because without this end state or achieved/acquired object, there is literally nothing to orient toward. If this state or object is unattainable, the goal remains a goal only until this unattainability is recognised. Hence, at the core of the goal is a thing or things we act to gain and/or keep — values. Nutrition, shelter, security, defense, leisure, convenience in communication and travel, power/control over the causal factors that affect us positively or negatively… These are all things we act to gain and/or keep, all ultimately in service of the ultimate value: life as a human being, volitional and self-sustaining.</text:p>
      <text:p text:style-name="Standard"/>
      <text:p text:style-name="Standard">As human beings, we can abstract from the present and past and project facts and values into the future, i.e. we can project what could happen, what would be worth achieving, how it could be pursued and achieved, etc. With this same ability, we can also project facts and values into other contexts, especially broader contexts that include a broader range of causal factors that could affect us. We can think not just about our home but our neighbourhood, our province, our country. We can think not just about how my actions affect me, but how they would affect others, and how these effects could propagate further (e.g. how certain engineering/architectural choices would impact the sturdiness of a bridge, how the next year’s harvest can be ensured and expanded with this year’s yield, how certain nutritional/fitness practices would affect long-term survival and robustness, how education would shape future success, how certain skills could aid me in diversifying my opportunities, how certain relationships could develop into a robust support system, etc.). In other words, our conceptual faculty elevates our ability to live beyond the instinctual, the present and the available. And the<text:s/><text:soft-page-break/>basic unit the conceptual faculty operates on is: ideas.</text:p>
      <text:p text:style-name="Standard"/>
      <text:p text:style-name="Standard">What we think about what is and could be, shapes what values we adopt, thereby what goals we set, thereby what actions we perform, thereby what effects we cause in ourselves and the world around us. Hence, whenever operating on levels beyond the immediate present, beyond the instinctual/reactive, we always operate on the basis of ideas.</text:p>
      <text:h text:style-name="Heading2" text:outline-level="2"><text:bookmark-start text:name="_5st4ubxk3rot"/><text:bookmark-end text:name="_5st4ubxk3rot"/>Delayed Ruination</text:h>
      <text:p text:style-name="Standard">Since ideas are the unit of the conceptual faculty, and since this faculty often deals with broader contexts and longer timeframes (e.g. weeks, months, years, lifetime/lifetimes, etc.), the effects of an idea on our actions is not always direct or easy to trace, especially since every idea shares a number of basic and complex actions with other ideas; e.g. whether we believe the Earth is flat or round, we still act to sustain ourselves via nutrition, threat-avoidance, etc. Likewise, whether we believe our fate is in the hands of God or in the hands of an indifferent universe, we may still value autonomy and the systems that support it. As another example, both a mystic and a scientist would rely on mechanical know-how to fix their broken-down car. Hence, an idea does not translate to a specific set of distinct actions wholesale, although there are values, goals and actions unique to each idea. Moreover, having an idea, no matter how good, does not safeguard you from unknowns beyond your context or errors of judgement. Lastly, just because you hold certain ideas does not mean you would always act in accordance with them; for example, an atheist may suddenly begin praying when in great distress, even if he does not believe in a deity (these would point to ideas subconsciously held and never properly rejected, perhaps). Subconscious notions and conflicting/contradicting ideas can certainly muddle our understanding of the effects of an idea.</text:p>
      <text:p text:style-name="Standard"/>
      <text:p text:style-name="Standard">For these reasons, the effect of bad ideas is often muddled by a number of other ideas (conscious or subconscious), individual judgement, lack of context/different context, commonalities with other viewpoints/approaches and short-term/medium-term positive impacts. I call this delayed/muddled effect of bad ideas delayed ruination, since bad ideas, if left unchecked, will shape values, goals and actions in ways that contradict the facts and the needs of human life, and these in turn, eventually, would tend to diminish, degrade or destroy us and the civilisations we build.</text:p>
      <text:p text:style-name="Standard"/>
      <text:p text:style-name="Standard">For example, the Roman Empire’s economic growth via expansion coupled with a weak economy placated with enormous public spending, free rations and spectacles, sustained the empire for 200+ years while constantly chipping away at its viability, including the long-term robustness of its military and infrastructure. As another example, the skepticism of the evidence of the senses and the lack of an objective theory of<text:s/><text:soft-page-break/>concepts and causation (starting as early as Francis Bacon and leading up to David Hume and beyond) led to the divorcing of philosophy from life, which in turn undermined any attempts at a worldly system of ethics, politics and epistemology, which in turn allowed mystical, deontological and pragmatic philosophies to take hold, along with anti-intellectual attitudes in many of the common public, further undermining efforts toward a viable philosophy of life. The totalitarianism and mass murder of the 1900s in Europe reveals the ugly ideas born out of the Enlightenment which the more rational ideas could not sufficiently counter.</text:p>
      <text:h text:style-name="Heading2" text:outline-level="2"><text:bookmark-start text:name="_6tdeg4auj4jp"/><text:bookmark-end text:name="_6tdeg4auj4jp"/>Ideas → Conditions vs. Conditions → Ideas</text:h>
      <text:p text:style-name="Standard">I have argued previously that ideas lay the groundwork for volitionally chosen and pursued values, goals and actions. However, ideas do not emerge from a vacuum but rather emerge from a combination of context (material and ideological), circumstance and individual effort. Hence, naturally, the conditions we find ourselves in can and do shape our ideas to some extent, directly and indirectly, just as ideas shape our conditions via our actions to some extent, directly and indirectly.</text:p>
      <text:p text:style-name="Standard"/>
      <text:p text:style-name="Standard">For example, efforts by women in the 1800s and 1900s (especially suffragettes, scientists, explorers, etc.) made the intellectual, rational and moral equality of women clear in a way that would not have been as clear in a more restrictive society such as, say, Ancient Greece. As another example, the value of scientific knowledge in practical spheres of life (rather than simply as knowledge for knowledge’s sake) was probably difficult-to-impossible for most people to grasp before significant technological advances (e.g. as in the industrial revolution).</text:p>
      <text:p text:style-name="Standard"/>
      <text:p text:style-name="Standard">A common man in Ancient Rome who struggles to make ends meet may not have the time or capacity to think about the broader implications of the workings of the empire and his participation in it. A regular soldier in Nazi Germany may struggle to recognise the depravity of his regime, especially as his mind is occupied with protecting his brothers-in-arms against threats to the sovereignty of his lifelong home. Does this excuse them completely? Not necessarily, but it certainly makes it harder to judge exactly where they went wrong or what they could have done. I make this point to underscore the fact that the adoption of good ideas is not automatic or easy, and moral and scientific progress can stagnate or backtrack without cataclysmic events. Rather than give up on the pursuit of valid and valuable ideas as worthless, we should recalibrate our expectations about the difficulty of this pursuit and the kind of effort it would take.</text:p>
      <text:p text:style-name="Standard"/>
      <text:h text:style-name="P393" text:outline-level="1"><text:bookmark-start text:name="_z28t599zp7ai"/><text:bookmark-end text:name="_z28t599zp7ai"/><text:soft-page-break/>False Ideas, Truth &amp; Incentive</text:h>
      <text:h text:style-name="Heading2" text:outline-level="2"><text:bookmark-start text:name="_dwr8b0hru9s7"/><text:bookmark-end text:name="_dwr8b0hru9s7"/>Definitions &amp; the Scope of Discussion</text:h>
      <text:p text:style-name="Standard">A false idea is any claim or proposition (i.e. a statement that asserts about the nature of one or more existents) that is contradicted by truth. Truth is that which corresponds to reality. I want, however, to expand on the scope of the discussion of false ideas, beyond the explicitly stated to the implicitly accepted, where the false ideas exist as implications of one’s conscious actions, unconscious attitudes or other ideas one may hold.</text:p>
      <text:p text:style-name="Standard"/>
      <text:p text:style-name="Standard">As for the definition of truth I have given, which may seem surprisingly simple, I would like to expand it in the following manner, for epistemological clarity: truth is that which derives from the direct evidence of the sense-perception (both external and internal, since internal states can also often be grasped directly) and can be derived from or validated by logic (both deductive and inductive) applied to this evidence. To be clear, while this puts truth firmly on empirical grounds, the pursuit of truth also presupposes the validity of concept-formation and the potential for valid induction, not merely observation and deduction.</text:p>
      <text:h text:style-name="Heading2" text:outline-level="2"><text:bookmark-start text:name="_hxpwcorjmr9q"/><text:bookmark-end text:name="_hxpwcorjmr9q"/>Purpose of the Discussion</text:h>
      <text:p text:style-name="Standard">The ideas we adopt and internalise have an enormous effect on the nature of our actions and their short-term and long-term consequences, both individually and as a collective (e.g. as a community, social class/group, political entity, etc.). This is argued for in<text:s/><text:a xlink:href="https://docs.google.com/document/d/11rAEx2wv2FyqM-0vBzU0Ogvptz6mmr48s1E64Itf0GY/" office:target-frame-name="_top" xlink:show="replace"><text:span text:style-name="T394">Ideas: A Matter of Life &amp; Death</text:span></text:a>, and demonstrated in my various discussions on ideas surrounding dehumanisation (<text:a xlink:href="https://docs.google.com/document/d/19teZQGQP4tWXGUnO4cZOBrQG1B5rueaHvezZ00iCYX0/" office:target-frame-name="_top" xlink:show="replace"><text:span text:style-name="T395">Dehumanisation</text:span></text:a>), personhood (<text:a xlink:href="https://docs.google.com/document/d/1HI8hxoPCi5_gqHrEqMAJ9Kf6f31vWvCOZqfUGyAStCM/" office:target-frame-name="_top" xlink:show="replace"><text:span text:style-name="T396">Personhood</text:span></text:a>), the pursuit of value (<text:a xlink:href="https://docs.google.com/document/d/1vKriFl-AVnuyDYWQmBDJkmw_JjXTz_lgUjhllJntQpY/" office:target-frame-name="_top" xlink:show="replace"><text:span text:style-name="T397">Vulnerability, Value &amp; Effort</text:span></text:a>) and other writings on epistemology, ethics and politics, as well as even a brief overview of the ideological movements and shifts that shaped the bloody history of Europe, the Americas, the Middle East, China, India and other regions of the world.</text:p>
      <text:p text:style-name="Standard"/>
      <text:p text:style-name="Standard">Consequently, under the premise that the pursuit of truth is the most effective approach — and the only fundamentally effective approach, in principle — <text:s/>to knowing and dealing with reality in the pursuit of values, the study of false ideas, especially pervasive ones with wide-reaching consequences on individuals and cultures across generations, becomes an urgent endeavour to uncover and potentially counter the root of current and future harm to the pursuit of truth and value, both individually and collectively.</text:p>
      <text:h text:style-name="Heading2" text:outline-level="2"><text:bookmark-start text:name="_nihgqi5wkpus"/><text:bookmark-end text:name="_nihgqi5wkpus"/>Truth as Defence of Falsehood</text:h>
      <text:p text:style-name="Standard">In my experience and in my view therefrom, the most pervasive and persistent false<text:s/><text:soft-page-break/>ideas are not wholesale lies. Rather, they often rely on truth on some level, also often relying on argumentation from the truth that, no matter how fallacious, does have the shape of reasoning. Note that this is not always the case, since many pervasive and persistent ideas — especially unfalsifiable ideas as found in religion — rely precisely on the ideas being beyond the scope of evidence and reasoning, or may exist despite evidence or reasoning to the contrary due to poor epistemology or evasion (e.g. the flat-earth theory, the conspiracy around vaccines, etc.). Also, of course, one must not discount the role of manipulation of the facts or the ignorance of the actual facts in question. However, in this section, I want to focus on those false ideas that do have some basis in truth and indeed rely on this basis for their weight.</text:p>
      <text:p text:style-name="Standard"/>
      <text:p text:style-name="Standard">Antisemitism, as presented in Hannah Arendt’s work “The Origins of Totalitarianism”, is one such idea. The connection between the Western and Central European Jewry and the ruling class, especially with the transition from decentralised feudal systems to more centralised autocracies or aristocracies starting from the eighteenth century, was real and evident — many jews did gain influence and privileges as the chief or even sole financiers of public enterprise. Their connections across the major power-centers of Europe, first through individual connections and later established more systematically (as with the Rothschild family in the nineteenth century), along with their accumulating wealth and apparent privileges, were a fact. However, evident from (1) the lack of allegiance of these jewish financiers to particular nations or even governments within a nation, and (2) the lack of political power they actually held, as evidenced by the belated emancipation of the wider Jewry and the lack of jewish involvement in state-level politics, the antisemitic suspicions of the jews as being the key drivers of the political climate were unfounded. These suspicions were mostly negative owing to inter-European conflicts and political-economic upheavals in Continental Europe, even as certain jews retained wealth and apparent influence.</text:p>
      <text:p text:style-name="Standard"/>
      <text:p text:style-name="Standard">Misogyny — the attribution of inherent viciousness or moral/practical weakness in women qua woman — is another false idea that has disturbed me greatly. It is very evidently false, once you grasp the full and fundamental humanity of women, in terms of potential for virtue and for vice, especially in the moral sense but also in the practical sense. I have the benefit now of having known — in my own life and looking at history — powerful and capable women, from journalists like Nellie Bly to adventurers like Dervla Murphy to thinkers and writers like Ayn Rand, Hannah Arendt, Simone de Beauvoir and Maya Angelou to the numerous mathematicians, scientists, doctors and innovators across time, as well as, of course, numerous modern women who are financially and practically self-reliant and serve as competent members of the public and private workforce. The sheer weight of historical and current evidence, along with the recognition of women as full humans, morally and practically — backed as much by<text:s/><text:soft-page-break/>science as by empirical observation of the diversity of individuals and individual capabilities seen among women, be it physical, intellectual or emotional — is sufficient to discount misogyny in its entirety. The fact that women have certain vulnerabilities and weaknesses compared to men is irrelevant, as irrelevant as the fact that one man has certain vulnerabilities and weaknesses compared to other men or even other animals, due to the simple fact that, regardless of comparison, women are fully viable, fundamentally robust life-forms (which means fundamentally capable of resilience in a wide range of environments) with the capacity to extend their natural capacities through the use of their mind and their existing physical capabilities, through science, technique and technology.</text:p>
      <text:p text:style-name="Standard"/>
      <text:p text:style-name="Standard">However, though I have the benefit of hindsight and better anthropology, it is key to note that misogyny is not “obviously” false, in the same way 1 + 1 = <text:s/>3 is. In other words, there are a number of facts that can be and have been used to support misogynistic ideas, ranging from physical differences (e.g. lower physical robustness and strength compared to men) to the prevailing behaviours and attitudes among women in a given place and period (e.g. lack of self-reliance, emotion-driven behaviour, passive aggression, moral and emotional unreliability, etc.), at least as observed by the people of the given place and period. I want to interject here and say that misandrist ideas can be derived from similar “evidence” in a given place and period (e.g. the view that men are inherently violent, that men lack emotional depth or understanding, that men are prone to dominating and displays of aggression, etc.). The facts may well be true, but the conclusions derived from these facts rely on assumptions that may be unfounded or untrue. For example, even if women in a given place and period tend to lack self-reliance, it is only the assumption that moral and practical capability — or lack thereof — can be inherent in a group humans (or women in particular) that leads to misogynistic views about a woman’s moral and practical self-reliance.</text:p>
      <text:p text:style-name="Standard"/>
      <text:p text:style-name="Standard">In short, false ideas may rely on truth as their explicit evidence, while relying implicitly on unfounded or untrue assumptions that slip under one’s intellectual radar as they are either taken for granted or justified through fallacious reasoning and false premises. This is a key insight, in my view, since it reveals that false ideas are not necessarily “stupid” or overtly irrational. As great as a thinker Aristotle was, his support of slavery and his deeply misogynistic views were not due to a sudden drop of his intellect but an application of his great intellect following from false premises that he had taken for granted. Thus, I believe that no one is immune from false ideas, not even rational people; however, a consistent commitment to rationality is the only way to overcome such ideas over time.</text:p>
      <text:h text:style-name="Heading2" text:outline-level="2"><text:bookmark-start text:name="_868xlufw8t2k"/><text:bookmark-end text:name="_868xlufw8t2k"/><text:soft-page-break/>Incentive as the Lubrication for Acceptance</text:h>
      <text:p text:style-name="Standard">There is no such thing as unmotivated reasoning, for there is no such thing as an unmotivated human, at least not insofar as they act toward some purpose. Motivation — which is the sum of internalised premises and values that shape and drive action toward a purpose — is fundamental to conscious action in general, and thought in particular, fundamental in both a philosophical sense (because humans are volitional, and volition, to be practiced, requires the desire to realise some recognised potential) and a practical sense (because of the observed inseparatibility between some sort of directly-experienced motive and conscious action).</text:p>
      <text:p text:style-name="Standard"/>
      <text:p text:style-name="Standard">Hence, when discussing why certain ideas — false or otherwise — are accepted by one or more individuals, it is also key to discuss the role of incentives — i.e. the facts from which motivation can be derived. In other words, speaking in particular about false ideas, we must assume that a false idea is never accepted without at least some incentive to accept it, and when a false idea is accepted, there is often some incentive — be it internal or external, personal or social, or what have you — that makes the acceptance of the false idea more attractive to an individual or collective than the idea’s rejection.</text:p>
      <text:p text:style-name="Standard"/>
      <text:p text:style-name="Standard">Consider the case of misogyny again. On the surface, at least to me, the sheer amount of diminishing, degrading views about women and the extent to which their potential has been stifled and suppressed is astounding and incomprehensibly monstrous. However, the view that every false idea and its propagation must have incentives behind it — human incentives — makes it very clear that this is not monstrous but, in some disturbing way, very human.</text:p>
      <text:p text:style-name="Standard"/>
      <text:p text:style-name="Standard"><text:span text:style-name="T398">Homo sum, humani nil a me alienum puto.</text:span></text:p>
      <text:p text:style-name="Standard">Hence, I thought about it from the perspective of seeking human — and thereby comprehensible and even sensible — incentives for misogyny, and the following is my hypothesis, one that I am fairly confident about but is admittedly lacking in rigorous historical and anthropological examination, at least to my current knowledge. Here is the key fact that I am drawing from: the toll of procreation is far higher — in terms of physical, practical and psychological impact, risk of disability and even death — than it is for men. Combine this with the following value-hierarchy that many humans have and have had across history: the value of familial structure and control, legacy and/or collective duty over individual flourishing. Here, in this value-hierarchy, even considering that women buy into it, the incentive of women to have children is counter-weighted by the massive toll procreation takes and can take from them, whereas for men, especially if individual flourishing is devalued or discounted, there is no such counter-weight and, combined with certain desires/ambitions (e.g. political power, social influence, long-term<text:s/><text:soft-page-break/>stability, etc.), the incentive for men is likely to be far higher than that of women. Combine this with the all-too-common attitude of humans to dominate dissent or even potential dissent into submission, we see that the control of female sexuality and individual pursuit can be seen as vital to this value-hierarchy.</text:p>
      <text:p text:style-name="Standard"/>
      <text:p text:style-name="Standard">In this setup, where control over a group of individuals is prioritised over value for the individuals in the group, there is a high incentive to suppress dissent, and a powerful way to do this is to make the suppressed group internalise disempowering ideas about themselves. Confidence in one’s abilities and potential is crucial in how far and in what way we exercise our abilities and pursue our potential (e.g. it can be argued that the pursuit of science began in earnest only when there was a shift in the attitudes toward the material world, viewing it as more orderly, more amenable to the human intellect and more worthy of valuing). Moreover, there is a high incentive for the oppressors to hold views that make it easier to dehumanise or diminish those they oppress — easier both psychologically and practically (by eliminating individual well-being “non-concerns” in many contexts). This is not to say that the expression and propagation of these ideas were necessarily intentional or calculated — though this is also possible — but rather (and I think more likely), when such ideas arose due to observations (e.g. looking at the way women behaved, or noting their physical disadvantages and vulnerabilities) and other prevailing ideas (e.g. religious views about gender-roles and duty), they became easier to adopt as a default or as a position that “made sense” (both intellectually and practically).</text:p>
      <text:p text:style-name="Standard"/>
      <text:p text:style-name="Standard">Let us consider another example: racist attitudes during the era of European colonisation efforts (e.g. the “white man’s burden”). Under a system that encouraged and benefited from the extraction of resources from a foreign land, and when it became easier to suppress, subdue or simply override the concerns of the people in these foreign lands (due to imbalances in power, driven by technology and political organisation), it also became more easier (both psychologically and practically) to accept ideas that diminished the oppressed and proclaimed the superiority and “right” of the oppressor. Again, I am not saying that these ideas were necessarily intentional or calculated — though they may well have been in many instances — but rather, in many cases, these ideas may have simply been easier to adopt and more attractive and, in various ways, “plausible” (e.g. by observing the power-imbalances, or highlighting the barbaric practices that were indeed present among the natives, etc.).</text:p>
      <text:p text:style-name="Standard"/>
      <text:p text:style-name="Standard">My point with these examples is to draw our attention to the mechanisms by which false ideas may be accepted, beyond argumentation or cultural inertia. This is crucial to understand, because I have noticed that even if a set of ideas are known to be false intellectually, if there are strong personal and systemic incentives to hold and promote<text:s/><text:soft-page-break/>these ideas, these incentives can take a lot more effort to hold oneself against these ideas and to spread more moral and truthful ideas. And it is crucial to note that no effort is free: the effort expended to hold oneself against a false idea is effort that is not available in expanding one’s pursuit of truth and value in other areas of life; this is not a matter of moral default but simply of practicality. For this reason, no matter the intellectual clarity we have about certain ideas, it is crucial to address the incentives (internal and external) that make the acceptance of false ideas easier and more attractive.</text:p>
      <text:p text:style-name="Standard"/>
      <text:h text:style-name="P399" text:outline-level="1"><text:bookmark-start text:name="_6dtazm9kqxvx"/><text:bookmark-end text:name="_6dtazm9kqxvx"/><text:soft-page-break/>Logic: The Method of Love</text:h>
      <text:p text:style-name="Standard">The first choice we make when engaging with the world is to simply affirm it. This choice is pre-rational, as rationality presupposes this choice, which is essentially the choice of affirming the axioms of logic, as it affirms existence exists, which affirms that A is A and A is not non-A at the same time and in the same respect. Hence, in a sense, reason is the faculty we exercise out of an affirmation of the basic truth of existence, and every exercise of logic is predicated on the affirmation of truth on a more fundamental level. Value is a form of truth, and love is the internalised affirmation of value. Thus, logic, when applied from the first-principles of purpose, is a method that is tied to love, not detached from it or devoid of it, and to the extent that you apply logic in a love-detached way, you apply it to things that you do not care about, which means this application is illogical when taken to the first-principles of purpose. To love is to value clarity and rational conviction about that which you love, and logic is the core method of approaching this.</text:p>
      <text:p text:style-name="Standard"/>
      <text:h text:style-name="P400" text:outline-level="1"><text:bookmark-start text:name="_ipfom2aytvfo"/><text:bookmark-end text:name="_ipfom2aytvfo"/><text:soft-page-break/>Beauty is Downstream of Love</text:h>
      <text:h text:style-name="Heading2" text:outline-level="2"><text:bookmark-start text:name="_k9m02oh9u8u7"/><text:bookmark-end text:name="_k9m02oh9u8u7"/>Important Philosophical Context</text:h>
      <text:list text:style-name="WWNum1">
        <text:list-item>
          <text:p text:style-name="P401"><text:a xlink:href="#_5gmzt35xyzib" office:target-frame-name="_top" xlink:show="replace"><text:span text:style-name="T402">Precision</text:span></text:a></text:p>
        </text:list-item>
        <text:list-item>
          <text:p text:style-name="P403"><text:a xlink:href="#_flp6rrkjoday" office:target-frame-name="_top" xlink:show="replace"><text:span text:style-name="T404">The Purpose of Life</text:span></text:a></text:p>
        </text:list-item>
      </text:list>
      <text:h text:style-name="Heading2" text:outline-level="2"><text:bookmark-start text:name="_d1iyh7kbvk3s"/><text:bookmark-end text:name="_d1iyh7kbvk3s"/>Beauty</text:h>
      <text:p text:style-name="Standard">Let us first define the concepts we have here, and then lay out why engaging with these concepts is relevant. Beauty is a form of evaluation, and in particular, it is the internalised evaluation of an object (be it a person, a place, a thing, an idea, etc.) as embodying/reflecting values and/or virtues. Here, there are 2 aspects that are relevant: (1) internalisation, and (2) moral evaluation.<text:s/><text:span text:style-name="T405">Internalisation</text:span><text:s/>refers to the process or result of automatising one’s responses to an object/kind of object through the absorption of premises that characterise the object/kind of object. For example, if we grow up associating science with rote memorisation and insoluble jargon, thereby characterising science as such, absorbing this characterisation may make us automatically weary of science-related topics. As another example, associating socialisation with weariness and anxiety may repel us from opportunities to socialise, even if such socialisation (and/or our ability to engage with such socialisation) is different from before and turns out to be compatible with our interests and desires. Internalisation is a key aspect of beauty, as it differentiates it from judgement that does not arise from a psychological context (which results from internalisation); this aspect makes beauty a force that affects our lived experience more directly, day-to-day and with greater motivational impact. The second aspect is<text:s/><text:span text:style-name="T406">moral evaluation</text:span>. This aspect differentiates beauty from the broader category of internalised judgement, as it implies that the judgement is specifically relates to our core convictions about the value, rather than a preference-based judgement. It is often said that beauty is subjective (“in the eye of the beholder”), and though it is true that beauty needs the subject as much as the object, the aspect of moral evaluation in beauty differentiates it from other “subjective” judgements such as taste, preference or momentary/situational desire. If we conflate beauty, taste, preference and momentary/situational desire, we lose out the concept that arises from the fact that moral premises have an effect on our psychological context and lived experience, and this is precisely the concept that beauty captures. For example, a mathematical proof is beautiful because it embodies (in its structure and contents) the efficacy of reason in revealing complex/hidden truths, which — if you regard epistemic virtues with moral weight — is truly beautiful in a way that vanilla ice-cream may not be (if you enjoy it greatly but do not take such pleasure as a core moral value).</text:p>
      <text:p text:style-name="Standard"/>
      <text:p text:style-name="Standard"><text:span text:style-name="T407">NOTE</text:span>:<text:s/><text:span text:style-name="T408">Internalisation can be gradual or drastic, as can shifts in one’s views of beauty.</text:span></text:p>
      <text:p text:style-name="Standard"/>
      <text:p text:style-name="Standard">Note, however, that I am not saying taste, preference and momentary/situational desire do not factor into beauty, but rather, beauty involves more than just these factors, adding to them a moral context rather than merely a psychological one. Furthermore, this understanding of beauty implies that the experience of beauty is predicated on internalised moral premises, which means what may be beautiful to one may be ugly to another (e.g. a mathematician/mathematically literate person may find a mathematical proof beautiful whereas someone else may find it tediously and/or pointlessly complex (and thereby ugly)). Moreover, we also see that since moral evaluation exists in a non-binary scale and exists with respect to context (not simply as binary good or bad, but as better or worse, or as more morally significant and less morally significant, or good in a certain context but not good in another context, etc.), it follows that beauty exists in the same way. Hence, though one may find both a well-written statement and his lover beautiful, the variety of beauty and the experienced intensity of beauty for each is qualitatively and/or quantitatively distinct.</text:p>
      <text:p text:style-name="Standard"/>
      <text:p text:style-name="Standard">The points made within the previous paragraph also reveal the relevance of beauty: beauty is the force that aligns us psychologically (i.e. with respect to experienced motivation and internally-driven investment) with our moral convictions and commitments on some level. The importance of absorbing our moral convictions and commitments into our psychological context (thereby “automatising” them to an extent) is laid out in<text:s/><text:a xlink:href="#_c3br4zv4dkkx" office:target-frame-name="_top" xlink:show="replace"><text:span text:style-name="T409">Conviction</text:span></text:a>. With both the definition and relevance of beauty in mind, we have the means and motive to understand the source of beauty, since we observe from its definitions and description that beauty is derivative evaluation and not a moral primary, which is why it is invalid to conclude that something is good because it is beautiful, rather than conclude that it is beautiful because it is good (it is an inversion of premise and conclusion).</text:p>
      <text:h text:style-name="Heading2" text:outline-level="2"><text:bookmark-start text:name="_r7g9a18brr01"/><text:bookmark-end text:name="_r7g9a18brr01"/>Love</text:h>
      <text:p text:style-name="Standard">Now, let us turn to a concept that is related to beauty in that it also involves the internalisation of core values and the response to these values as embodied in an object. This concept is love. Let me carefully lay out the context in which this concept exists. We want to differentiate between valuing with and without active commitment toward the object of value. Without such commitment, the act of valuing is not so much for the object as it is for the category of objects, i.e. we value the existence of such existents without necessarily prioritising a particular existent of this category. Crucially, note here that valuing always requires commitment in action (since without such commitment, it remains a floating abstraction rather than a genuine moral/practical conviction), but what you commit to may not necessarily be the particular object you are valuing in a particular context. Let me illustrate with the way we value humans. We do<text:s/><text:soft-page-break/>not actively commit to the wellbeing of each and every human on an individual level, but we act to safeguard human rights or wellbeing in certain contexts where our engagement is possible or necessary, e.g. in emergencies, in particular instances (e.g. helping a stranger), or in advocating/supporting political and social changes. This kind of commitment is a commitment not to particular individuals but to the principle of engaging with individuals in certain contexts. Hence, in this context, we value humans incidentally or instrumentally with respect to our broader commitment. Love identifies the act of committing to an object of value (which can even be a principle of a category), differentiating it from valuing an object as a by-product of our commitment rather than the object of our commitment itself. Hence, here, we can love humans as a category but not necessarily particular humans. Of course, we can love particular humans as well, but not merely out of the broader commitment to humanity but to a personal, individualised commitment.</text:p>
      <text:p text:style-name="Standard"/>
      <text:p text:style-name="Standard">However, we are not yet done with this concept, since we can observe that we can certainly commit to our values without necessarily feeling much about them, at least for a while (e.g. when we recognise what is moral without having internalised these premises in our context). The concept of love also serves to differentiate between commitment out of moral obligation and commitment that has internalised this moral obligation in a psychological context. This aspect of internalisation is another tie between love and beauty.</text:p>
      <text:p text:style-name="Standard"/>
      <text:p text:style-name="Standard">Hence, we can outline the 2 essential components of love: (1) moral (i.e. value-oriented) commitment to a particular object and (2) internalisation of the moral context into the psychological context, whereby our commitment is not merely obligation-based but also (at least in part) internally-driven. Here, note that particularity is key, since we cannot commit “generally” or “vaguely”, since commitment involves concretisation of intent through consistent action; here, note that even when loving a category/form of engagement (e.g. “humanity”, “respect for human rights”, etc.), we are loving a particular category/form of engagement for particular reasons through particular actions. Furthermore, note that if our commitment is to reason and the values we identify through reason, commitment both precedes and promotes internalisation. Also, of course, internalisation, being the source of internally-driven motivation, promotes commitment. Hence, these components are mutually reinforcing while also being logically predicated on moral commitment (hence, you can indeed grow to love someone you value, given consistency in your moral commitment).</text:p>
      <text:p text:style-name="Standard"/>
      <text:p text:style-name="Standard">This has important implications in the practice of love. If you value someone and see it fit to integrate them more deeply into your life, your moral commitment internalises this value and becomes love, and since internalised orientation is not and should not be a<text:s/><text:soft-page-break/>primary and does not necessarily sustain by inertia alone (since we can subconsciously absorb a variety of rational and irrational things that can develop or deteriorate our internalisation of values), moral commitment to one’s life and values within it requires one to not only develop love but sustain it consciously and consistently, insofar as one rationally judges it as worth sustaining. This might sound cold or calculating, but practically, it is both liberating and optimistic; it liberates you from the fear of “falling out of love” from someone you find genuine values and virtues in, and it makes you optimistic about the integration of their immense value in your life long-term.</text:p>
      <text:p text:style-name="Standard"/>
      <text:p text:style-name="Standard">Note, however, that we can also recognise the object of our love through internalised values, wherein we respond to the object of love and (more or less) automatically come to love them as our commitment is internally fuelled from the start. However, even here, since internalisation of values is not a primary and does not necessarily sustain by inertia alone, it is crucial to validate this response rationally and sustain it consciously and consistently. In the words of the 12th Doctor: “Love is not an emotion. Love is a promise.” Specifically, it is a promise that creates the preconditions for deep investment and is fuelled by this investment, ultimately resting on one’s commitment to one’s life and values.</text:p>
      <text:h text:style-name="Heading2" text:outline-level="2"><text:bookmark-start text:name="_cvw9wzja0dws"/><text:bookmark-end text:name="_cvw9wzja0dws"/>Love &amp; Beauty</text:h>
      <text:p text:style-name="Standard">Having defined both beauty and love and seen their conceptual and practical relevance, we also see that these concepts have a deep relationship: both involve morality (either as evaluation or as commitment) and internalisation of one’s moral context. But note the crucial difference. Beauty is a kind of response, whereas ove is a kind commitment. As discussed in the section on love, the internalisation of valid moral premises requires moral commitment, and it is this internalisation that leads to the kind of psychologically-fuelled moral evaluation we see in beauty. In this understanding, the conclusion is almost obvious: beauty is downstream of love, and thus, the nature of beauty relies on the nature of love.</text:p>
      <text:p text:style-name="Standard"/>
      <text:p text:style-name="Standard">What does this mean in practice? This means beauty standards detached from the contextual application of moral premises and principles are arbitrary and irrational. But since beauty rests on internalisation, which involves or involved some kind of moral commitment (hence, some kind of love), the validity and impact (positive or negative) of one’s response to beauty rests on the validity and impact (positive or negative of one’s love (be it consciously chosen or unconsciously chosen). This is crucial to understand, since what we discussed about practicing love rationally is predicated on a commitment to reason; without this commitment, we can still love and love deeply (wherein our we commit to the values we hold without commitment to reason and rational validation), but this love may hurt or harm us in one or more ways, in our pursuit of our life and values.<text:s/><text:soft-page-break/>The views of beauty that arise from such love exacerbate the damage by reinforcing and reaffirming the underlying irrational moral context. For this reason, I do not consider it possible to love someone “apart from” their beauty; rather, the appreciation of their beauty is enabled and enacted by the proper practice of love. Reason should come first, (“should”, not that it always “does”), then love, then beauty. However, interestingly, as I shall show in the next section, while reason validates love at higher levels of complexity, it is in some sense predicated on a kind of love at its base. This point shall properly clarify my philosophical stance.</text:p>
      <text:h text:style-name="Heading2" text:outline-level="2"><text:bookmark-start text:name="_3rzjcvt5gxfi"/><text:bookmark-end text:name="_3rzjcvt5gxfi"/>Logic is the Method of Love</text:h>
      <text:p text:style-name="Standard"><text:span text:style-name="T410">Source</text:span>:<text:s/><text:a xlink:href="#_6dtazm9kqxvx" office:target-frame-name="_top" xlink:show="replace"><text:span text:style-name="T411">Logic: The Method of Love</text:span></text:a></text:p>
      <text:p text:style-name="Standard"/>
      <text:p text:style-name="Standard">The first choice we make when engaging with the world is to simply affirm it. This choice is pre-rational, as rationality presupposes this choice, which is essentially the choice of affirming the axioms of logic, as it affirms existence exists, which affirms that A is A and A is not non-A at the same time and in the same respect. Hence, in a sense, reason is the faculty we exercise out of an affirmation of the basic truth of existence, and every exercise of logic is predicated on the affirmation of truth on a more fundamental level. Value is a form of truth, and love is the internalised affirmation of value. Thus, logic, when applied from the first-principles of purpose, is a method that is tied to love, not detached from it or devoid of it, and to the extent that you apply logic in a love-detached way, you apply it to things that you do not care about, which means this application is illogical when taken to the first-principles of purpose. To love is to value clarity and rational conviction about that which you love, and logic is the core method of approaching this.</text:p>
      <text:p text:style-name="Standard"/>
      <text:p text:style-name="Standard">Now, I had said that reason should be the basis of love. What is the basis for this “love of existence”? It is in fact the basis of reason itself: the affirmation of existence. I place the love of existence as primary because it is a commitment on which reason is predicated. Hence, the chain is: “love of existence” → “commitment to reason” → “validation of further love”. In essence, the basis of love and reason is the affirmation of existence, and reason follows a commitment to this affirmation. Hence, is this love irrational? No, it is pre-rational; irrational would mean it is detached from/contrary to reason, but it is precisely what enables reason. Also, the reason I insist on calling this pre-rational precondition of reason “love” is because is aligns with my definition of love: a moral commitment to existence (“moral” in the sense that it is the precondition for morality and sustains any further moral commitment) that involves the internalisation of the moral context (“moral” in the sense of being related to fundamental choice-driven orientation) of choosing existence. Also, it sounds more poetic.</text:p>
      <text:p text:style-name="Standard"/>
      <text:soft-page-break/>
      <text:p text:style-name="Standard"><text:span text:style-name="T412">NOTE</text:span>:<text:s/><text:span text:style-name="T413">Like any form of love, the love of existence involves consistent and committed choice.</text:span></text:p>
      <text:p text:style-name="Standard"/>
      <text:h text:style-name="P414" text:outline-level="1"><text:bookmark-start text:name="_tt8wq03ch458"/><text:bookmark-end text:name="_tt8wq03ch458"/><text:soft-page-break/>Standards, Expectations &amp; Comparisons</text:h>
      <text:p text:style-name="Standard"><text:span text:style-name="T415">Specifically with respect to beauty, but more generally for values as such.</text:span></text:p>
      <text:p text:style-name="Standard"/>
      <text:p text:style-name="Standard">I have observed that a lot of our reaction toward objects of value or potential value stem not from the recognition of intrinsic value or intrinsic potential for value but from the expectations we have about (1) the object in question, (2) the components of value in the given context, and (3) the context itself. A standard of beauty is essentially the definition of what constitutes embodied value, and therefore, what to expect when it comes to regarding something or someone as embodying values.</text:p>
      <text:p text:style-name="Standard"/>
      <text:p text:style-name="Standard">Now, expectations and standards are not necessarily valid, i.e. not necessarily aligned with (1) relevant values and (2) values as they present themselves or are expressed in the given context. Hence, an aesthetic response is proof of nothing but aesthetic capacity and, perhaps, the existence of certain aesthetic sensibilities. Another point to make here is that having different standards for beauty for different contexts and purposes does not necessarily mean lower or higher standards; a hierarchy of standards implies a common standard by which other standards are evaluated, and there may be no common standard. Indeed, there often is not; compare individual beauty, or the beauty of men and women, or the beauty of various flowers, or the beauty of different landscapes, and you shall see that often, such comparison at best is meaningless (i.e. having no value-oriented purpose or connection to the given context) and at worse obscures the kind of values actually present and worth engaging with.<text:span text:style-name="T416"><text:s/>A competitive/comparative mindset suggests that values exist in an ordinal scale, but in many contexts, values exist in a categorical scale.</text:span><text:s/>It is not always possible or useful to measure value against value.</text:p>
      <text:p text:style-name="Standard"/>
      <text:h text:style-name="P417" text:outline-level="1"><text:bookmark-start text:name="_fuz4wqe1702r"/><text:bookmark-end text:name="_fuz4wqe1702r"/><text:soft-page-break/>Evaluation &amp; Comparison</text:h>
      <text:h text:style-name="Heading2" text:outline-level="2"><text:bookmark-start text:name="_1joy2tcj7vo2"/><text:bookmark-end text:name="_1joy2tcj7vo2"/>Definitions</text:h>
      <text:p text:style-name="Standard">Evaluation is the process of identifying and/or defining the value(s) present with respect to something (an object, a person, a condition, etc.) and in a certain context and purpose. Value is that which one acts to gain and/or keep, i.e. it is the object of some purpose (be it a broader purpose, e.g. “health”, “satisfaction”, or a narrower purpose, e.g. “food”, “clothing”). Comparison is the process of identifying and/or defining the similarities and differences between two or more units. When it comes to defining these similarities and differences, we may do so quantitatively (referring to ordinal or scalar measurements) or qualitatively (referring to the presence/absence of incommensurable attributes).</text:p>
      <text:h text:style-name="Heading2" text:outline-level="2"><text:bookmark-start text:name="_80kbctsfumdq"/><text:bookmark-end text:name="_80kbctsfumdq"/>Comparison in Evaluation</text:h>
      <text:p text:style-name="Standard">Values are hierarchical and thus exist in relation to some broader/more fundamental value or purpose, i.e. in relation to a standard of value. Thus, identifying and defining values in a given context and purpose presupposes having defined a standard of value for the given context and purpose. Comparison, when applied to values, becomes a form of evaluation when one unit is used as the standard of value in the given context and purpose. Whenever we use comparison as a form of evaluation, i.e. as a way to identify values, the things that compare most favourable are values whereas the rest become potential values, i.e. things that would become values in the absence of the currently-identified values.</text:p>
      <text:p text:style-name="Standard"/>
      <text:p text:style-name="Standard">This is the conceptual framework. However, in practice, I often observe major issues when using comparison as a form of evaluation. I shall first list out the areas where I feel deeply uncomfortable using comparison as evaluation. While discomfort is not by itself a proof of anything, it does point to something unresolved in the use of comparison as evaluation. The list is as follows:</text:p>
      <text:list text:style-name="WWNum8">
        <text:list-item>
          <text:p text:style-name="P418">Comparing your life with others’</text:p>
        </text:list-item>
        <text:list-item>
          <text:p text:style-name="P419">Comparing your capabilities with others’</text:p>
        </text:list-item>
        <text:list-item>
          <text:p text:style-name="P420">Comparing other people to loved ones (e.g. friends, partners, family, etc.)</text:p>
        </text:list-item>
        <text:list-item>
          <text:p text:style-name="P421">Comparing groups of people (gender, race, economic strata, nationalities, etc.)</text:p>
        </text:list-item>
      </text:list>
      <text:p text:style-name="Standard"/>
      <text:p text:style-name="Standard">I shall now do the following:</text:p>
      <text:list text:style-name="WWNum6">
        <text:list-item>
          <text:p text:style-name="P422">Go through each example</text:p>
        </text:list-item>
        <text:list-item>
          <text:p text:style-name="P423">Identify the source of my discomfort</text:p>
        </text:list-item>
        <text:list-item>
          <text:p text:style-name="P424">Try to reach a generalisation that captures each example with a broader truth</text:p>
        </text:list-item>
      </text:list>
      <text:h text:style-name="Heading3" text:outline-level="3"><text:bookmark-start text:name="_c3mug4kv9puk"/><text:bookmark-end text:name="_c3mug4kv9puk"/><text:soft-page-break/>Case 1: Comparing your life with others’</text:h>
      <text:p text:style-name="Standard"><text:span text:style-name="T425">What this involves</text:span>: In essence, this involves judging the worth of the aspects of your life based on how they compare to aspects of others’ lives (be it a particular person or persons, or a general idea of “normal” or “successful”). This is not merely an intellectual or emotional exercise but something that translates to how much you care about and tend to these aspects of your life. This creates desires/wishes for what others have and you do not purely on the basis of these things comparing positively to what you have, based on some standard.</text:p>
      <text:p text:style-name="Standard"/>
      <text:p text:style-name="Standard"><text:span text:style-name="T426">Merits and demerits</text:span>: Value rests on context and purpose. Your context and purpose is highly individual, but there often are similarities among the contexts and purposes of various people, in which case values within that subset of contexts and purposes become commensurable. For example, if I am healthy but frail, and someone else is healthy but strong without doing something that is outside my capabilities or hierarchy of values (e.g. weight training, walking, etc.), it is valid to judge my frailty as something to move away from in favour of the kind of strength they possess. However, when values are judged out-of-context (e.g. if your interests, tendencies and responses are distinct yet you covet a certain temperament), they translate into desires/wishes that are arbitrary, i.e. detached from your context and purpose(s), and thereby they lead to exhaustion and possibly detriment (since you (1) do not pursue values that align with your context and purpose(s), (2) you lose time and energy for pursuits that do not yield benefit (overall) within your context and purpose and (3) what you pursue out-of-context may be antagonistic to your interests (e.g. people of a certain body type aiming for the thin-ideal, leading to eating disorders, or people fixating on health-related measures without focusing on holistic value-seeking, leading to hypochondria)).</text:p>
      <text:p text:style-name="Standard"/>
      <text:p text:style-name="Standard"><text:span text:style-name="T427">Resolution</text:span>:</text:p>
      <text:p text:style-name="Standard">Here is a poem I had written in this regard:</text:p>
      <text:p text:style-name="P428"/>
      <text:p text:style-name="Standard"><text:span text:style-name="T429">I can be no one else and none can be me;</text:span></text:p>
      <text:p text:style-name="Standard"><text:span text:style-name="T430">All that was and is are open to no plea, no</text:span></text:p>
      <text:p text:style-name="Standard"><text:span text:style-name="T431">Wish, no whim, no whimsical dream, for</text:span></text:p>
      <text:p text:style-name="Standard"><text:span text:style-name="T432">Such dreams are but a dried-up stream, tied up</text:span></text:p>
      <text:p text:style-name="Standard"><text:span text:style-name="T433">In the null, in the sheer lifeless beyond, for</text:span></text:p>
      <text:p text:style-name="Standard"><text:span text:style-name="T434">They shun and spurn all of which to be fond.</text:span></text:p>
      <text:p text:style-name="P435"/>
      <text:p text:style-name="Standard"><text:span text:style-name="T436">What is, is, and what is not, is not;</text:span></text:p>
      <text:p text:style-name="Standard"><text:span text:style-name="T437">Such is all I need, and such is all I’ve got. I’ll</text:span></text:p>
      <text:p text:style-name="Standard"><text:span text:style-name="T438">Seek the desirable, the parts I want as mine, but</text:span></text:p>
      <text:p text:style-name="Standard"><text:span text:style-name="T439">All that’s aspirable can never outshine the</text:span></text:p>
      <text:soft-page-break/>
      <text:p text:style-name="Standard"><text:span text:style-name="T440">Whole that is me, that I am and could be. No</text:span></text:p>
      <text:p text:style-name="Standard"><text:span text:style-name="T441">Other’s life is mine, nor can be, nor should be.</text:span></text:p>
      <text:p text:style-name="Standard"/>
      <text:p text:style-name="Standard">This poem captures the idea that one’s individual context and purpose are one’s own, unique on the whole, comparable in certain delimited contexts but not as a whole. I cannot in any coherent way “want” what someone else has out-of-context, unless I am literally willfully ignoring or deluding myself about the context and potential of my life, substituting reality for fantasy as the standard of value and judgement.</text:p>
      <text:h text:style-name="Heading3" text:outline-level="3"><text:bookmark-start text:name="_klzj6ekof4wn"/><text:bookmark-end text:name="_klzj6ekof4wn"/>Case 2: Comparing your capabilities with others’</text:h>
      <text:p text:style-name="Standard">This is very similar in essence as case 1, since capabilities constitute one’s life and potential to pursue purposes within one’s life, thereby constituting an aspect of one’s life. Hence, let me instead concretise this case to highlight the merits and demerits of comparative evaluation in this case.</text:p>
      <text:p text:style-name="Standard"/>
      <text:p text:style-name="Standard">1) Let us say you focus on developing one set of intellectual skills (e.g. theoretical thinking, conceptual clarity, methodical logic, etc.) whereas someone else develops another set of intellectual skills (e.g. practical know-how, rapid associations, intuitive reasoning, etc.). If you evaluate your capabilities as inherently lesser than this other person, you are discounting the sheer value of your capabilities in a variety of domains (e.g. science, technology, large-scale organisation, system design, etc.). Moreover, you are ignoring the fact that though you may not be able to invest as much time and energy in developing the capabilities he has, your and his capabilities are not mutually exclusive and either can improve on other capabilities with time, energy and the right approach. Lastly, developing one’s capabilities, like anything, must be done with respect to one’s broader hierarchy of values; hence, in many cases, collaborating is more practical than the development of one’s own capabilities (this is a basis of “division of labour”).</text:p>
      <text:p text:style-name="Standard"/>
      <text:p text:style-name="Standard">2) Let us say you have a certain body type and genetic makeup that predisposes you to certain risks and weaknesses compared to someone else; e.g. you may be more prone to diabetes, or have a lower propensity to build muscle, etc. To deem your capabilities as inherently less valuable ignores the question: valuable to whom and for what? To you, developing your capabilities and preserving them, such as they are, is supremely important and cannot be sidelined just because they are “lesser”. To despair about one’s own capabilities based on comparison, then, undermines this crucial need by depriving you of self-value and motivation.</text:p>
      <text:h text:style-name="Heading3" text:outline-level="3"><text:bookmark-start text:name="_saemhzsf5jis"/><text:bookmark-end text:name="_saemhzsf5jis"/>Case 3: Comparing other people to loved ones</text:h>
      <text:p text:style-name="Standard"><text:span text:style-name="T442">What this involves</text:span>: In essence, this involves judging the worth of the aspects of a<text:s/><text:soft-page-break/>loved one based on how they compare to aspects of others (be it a particular person or persons, or a general idea/expectation of what they “should” be). This is not merely an intellectual or emotional exercise but something that translates to how much you care about and tend to these loved ones, especially when given the opportunity to deal with the other people you deem “more valuable”. This creates desires/wishes for valuing others over your loved ones in some way purely on the basis of these things comparing positively to how these others compare with your loved ones, based on some standard.</text:p>
      <text:p text:style-name="Standard"/>
      <text:p text:style-name="Standard"><text:span text:style-name="T443">Merits and demerits</text:span>: When attributes are commensurable and the context and purpose are similar (e.g. in the case of a friend and his listening capabilities, which are weaker due to his lack of interest/engagement compared to someone with a similar context but better listening capabilities), comparative evaluation can be valuable, in the same way as it can be valuable when applied to oneself. However, when it comes to loved ones, there are a few considerations that are distinct from considerations applied to oneself. In one’s own case, one’s own life is primary, and that shapes what values become primary. This cannot easily be applied to loved ones, because they are people apart from oneself. However, what is crucial to grasp are 2 key aspects that are fundamental to long-term value-oriented relationships: (1) commitment and (2) particularity. Commitment is easier to grasp: to ensure a relationship and its extensions (e.g. support system, company, value built across time, etc.) exist without insecurity and constant deviation of efforts into back-ups and vigilance (all of which practically undermine the long-term aspects of value-oriented relationships), we must ensure that commitment is based on a commitment to values and virtues whose consistent maintenance is within the agency of either party; if it is not, the commitment to the relationship remains contingent on factors beyond the control, capacity or interest (as per one’s hierarchy of values) of one or both parties. To be clear, short-term relationships are not inherently wrong, but a long-term relationship cannot survive with such insecurity. As for particularity, this is a simple but important concept: the particular values a person brings and the particular ways they integrate with your life is not interchangeable with someone else, because individuals and the circumstances they engage with are fundamentally unique (at the very least in history and awareness). Hence, comparative evaluation for inherent worth is not only detrimental to commitment in a relationship but also ignores the particularity of the value and value-integration of the loved one in your life. Someone else could embody similar values or even the same values, but cannot do so in the same way, which means integrating their presence in your life is a separate effort requiring its own integration across time and with energy applied by both parties; hence, we see that “exchanging” relationships is not like swapping one part for another, but rather, letting go of one web of particular values and practicalities that was slowly and carefully built and slowly and carefully building another web of particular values and practicalities. Time and energy are limited, life is finite, and<text:s/><text:soft-page-break/>thus, such an investment or re-investment is not a matter to be taken lightly.</text:p>
      <text:h text:style-name="Heading3" text:outline-level="3"><text:bookmark-start text:name="_9pjmccw7naj5"/><text:bookmark-end text:name="_9pjmccw7naj5"/>Case 4: Comparing groups of people</text:h>
      <text:p text:style-name="Standard">If your purpose is to deal with individuals, you deal with individuals and not groups. If certain group characteristics are widely applicable and relevant at an individual level, consider them where necessary (e.g. anatomy, risk profiles, etc.). And there can well be characteristics intrinsic to the group as a whole, but so long as they are human beings, these intrinsic characteristics can never be moral and rational characteristics, because morality and rationality are based on volition and an individual’s commitment to reality and one’s own life. Granted, there can be moral and rational characteristics that are widely present in a group, maybe even universally present (e.g. cultural attitudes, ideologies, values, etc.), but these are not intrinsic, simply situational (with respect to history and current circumstance).</text:p>
      <text:p text:style-name="Standard"/>
      <text:p text:style-name="Standard">Hence, I submit: you can compare groups of people according to:</text:p>
      <text:list text:style-name="WWNum11">
        <text:list-item>
          <text:p text:style-name="P444">Tendencies (moral or otherwise)</text:p>
        </text:list-item>
        <text:list-item>
          <text:p text:style-name="P445">Morality and rationality as currently held (especially for ideological groups)</text:p>
        </text:list-item>
        <text:list-item>
          <text:p text:style-name="P446">Constitutional characteristics</text:p>
        </text:list-item>
        <text:list-item>
          <text:p text:style-name="P447">Statistical profiles</text:p>
        </text:list-item>
      </text:list>
      <text:p text:style-name="Standard">But these comparisons, by reason, can never be about:</text:p>
      <text:list text:style-name="WWNum9">
        <text:list-item>
          <text:p text:style-name="P448">The intrinsic worth of individuals</text:p>
        </text:list-item>
        <text:list-item>
          <text:p text:style-name="P449">The moral and rational potential of individuals</text:p>
        </text:list-item>
      </text:list>
      <text:p text:style-name="Standard"/>
      <text:p text:style-name="Standard"><text:span text:style-name="T450">NOTE</text:span>:<text:s/><text:span text:style-name="T451">An intrinsic characteristic is that which is causally necessitated by the core constitution and fundamental characteristics of the group members. A situational characteristic is simply that which exists due to various causes that are not entirely derived from the core constitution and fundamental characteristics of the group group.</text:span></text:p>
      <text:h text:style-name="Heading1" text:outline-level="1"><text:bookmark-start text:name="_8jtw05qwy2to"/><text:bookmark-end text:name="_8jtw05qwy2to"/></text:h>
      <text:h text:style-name="P452" text:outline-level="1"><text:bookmark-start text:name="_t500uqm400cy"/><text:bookmark-end text:name="_t500uqm400cy"/><text:soft-page-break/>The Self &amp; Free Will</text:h>
      <text:p text:style-name="Standard">Consider a causal chain. It cannot be understood by simply looking at its parts and their actions; you have to relate its parts with its other parts, but in doing so, you are integrating it, i.e. treating it not just as a sum of its parts but as a new unit that involves its parts and their relationships and thereby becomes something qualitatively distinct, i.e. it possesses attributes its parts do not.</text:p>
      <text:p text:style-name="Standard"/>
      <text:p text:style-name="Standard">Similarly, a feedback loop cannot be understood without understanding the causal chain within it and the aspect of its own outputs feeding into its inputs; but, again, in understanding these aspects, you have to grasp the loop as something beyond the sum of its parts. The “causal chain + feedback” produces attributes and potentials that are distinct from a mere causal chain, and so, a feedback loop is not “just” a causal chain plus the feedback mechanism; it is this, and also the whole that these aspects produce that acts and interacts distinctively.</text:p>
      <text:p text:style-name="Standard"/>
      <text:p text:style-name="Standard">Similarly, a human is a system of sub-systems, themselves either systems of elements or sub-systems. Just as with the causal chain and the feedback loop, a human cannot simply be understood as “just” a bunch of atoms, or “just” a bunch of interacting causal chains and feedback loops that build up to broader causal chains and feedback loops. As a whole, she is qualitatively distinct in her capability and potential for actions, reactions and interactions. This integration is what we call the “self”, and obviously, it is very real and very distinct from inanimate matter or simpler mechanistic systems.</text:p>
      <text:p text:style-name="Standard"/>
      <text:p text:style-name="Standard">This means, in a real sense, since the “self” is a feedback loop consisting of causal chains and feedback loops, a human is herself a part of what determines her actions. Hence, in a real sense, she can act as per her own judgement (again, a result of multiple integrations on many levels, including the level of awareness). Self-determination, then, is simply a statement of fact, not an illusion.</text:p>
      <text:p text:style-name="Standard"/>
      <text:p text:style-name="Standard">But, technically, if prior causes lead to she is and can be, and do so as per the laws of nature and/or (in some viewpoints) randomness, her self-determination is not really “free”, i.e. detached from prior causes. The answer is yes, it is not, but so what? Her wants, her judgement, her decisions, etc. are still her own, and she can still act on her own terms, for there is no “self” apart from this integration of cause-and-effect, and thus, there is no “self” that is sitting apart from this drama as a “helpless spectator”. Something determinists fail to mention is that, even if our future is determined, we are part of what determines it. Something could not have happened otherwise, since the past is not open to change; but the present and the future is, and even if an observer can predict everything we do, we are still doing it, consciously, with intent and desire.</text:p>
      <text:p text:style-name="Standard"/>
      <text:soft-page-break/>
      <text:p text:style-name="Standard">My point is not that determinism is completely wrong, but that the anguish associated with it is misplaced. It is a similar issue as the issue of “zooming out” to a cosmic scale and calling our problems insignificant; we do not live at a cosmic scale, so that perspective means nothing to our values. Similarly, if we “zoom out” to a third-person view of our lives, we can call out lives “determined” <text:s/>yet we do not live in a third-person view, so that perspective means nothing to our own choices and decisions.</text:p>
      <text:p text:style-name="Standard"/>
      <text:p text:style-name="Standard">This is not to say that the cosmic scale or the third-person perspective are not true; they most certainly are. But they are evidently insufficient in accounting for the facts facing the first-person, embodied perspective — experience, judgement, learning, course-correcting, etc. — just as the first-person view on its own cannot comprehend insights on causal mechanisms and large/astronomical space and time. Ironing out these details is not more objective, because these details do exist and are causally and operatively relevant. The usual deterministic position that we do not “really” choose our decisions as we do not choose our prior causes is incoherent; prior causes do shape our choices but do not make them for us, for without us and our own self-driven action, there is no decision at all.</text:p>
      <text:p text:style-name="Standard"/>
      <text:p text:style-name="Standard">A crucial point to note here is that a third-person perspective that grasps all our decisions as pre-determined is either completely irrelevant — since we do not know it — or completely outdated — since knowing it can be a conscious causal factor in shaping our future decisions. This means when dealing with a human at the level of her own experience, pre-determinism is never relevant to oneself, since any pre-determination that is known becomes an input that causes reality to diverge from the pre-determination’s own conditions.</text:p>
      <text:h text:style-name="P453" text:outline-level="1"><text:bookmark-start text:name="_mhngerl66l7o"/><text:bookmark-end text:name="_mhngerl66l7o"/><text:soft-page-break/>No Soul-Body Split</text:h>
      <text:p text:style-name="Standard">I have argued in<text:s/><text:a xlink:href="#_t500uqm400cy" office:target-frame-name="_top" xlink:show="replace"><text:span text:style-name="T454">The Self &amp; Free Will</text:span></text:a><text:s/>that the “self” is essentially an integration, a system of systems of systems, accumulating, aggregating, integrating, changing, replacing, disintegrating, etc. This ties into what I believe is the real-life analog of what people refer to when they speak of a “soul”: a distinct, active awareness that acts in and interacts with the world around it, through its apparati (sensory, cognitive, physical, etc.). In essence, the soul is what makes a human life form a self-driven agent whose agency is, in some real sense, self-contained (unlike an automaton).</text:p>
      <text:p text:style-name="Standard"/>
      <text:p text:style-name="Standard">Hence, I would trace my ideas like this. In my view, the real fact that most closely corresponds to what we may call a "soul" is the principle that makes us the unique kind of self-driven, self-sustaining agents that we are. Hence, in my view, the idea of a "soul" maps to the idea of a “principle of life”, and thus, if we stretch this idea a bit, we can say that different kinds of living beings have different kinds of souls, i.e. different kinds of life-sustaining systems and structures that make them the kind of self-driven, self-sustaining agents.</text:p>
      <text:p text:style-name="Standard"/>
      <text:p text:style-name="Standard">That being said, I think “soul” is generally not a very useful or well-defined concept, as it has too much supernatural baggage (due to many prevalent views of the “self”, chiefly religious views). In this light, I would summarise my views as follows: we are not different from other living beings in substance, only in structure. In my view, there's no external, immaterial element (e.g. some kind of eternal "soul") that makes humans fundamentally different from other living beings.</text:p>
      <text:p text:style-name="Standard"/>
      <text:p text:style-name="Standard">This contextualises the soul-body split that is often present in some viewpoints. There is no “self” that exists apart from the apparatus that gives rise to its potential for agency, and thus, there is no immaterial, transcendent soul. Another way to put this is that the soul emerges from integration, and disintegration (e.g. through death) causes the soul to cease to exist. This is grounded by the way many things we consider as core parts of the self (character, experience, psychological tendencies, etc.) can be manipulated through physical and chemical means (e.g. drugs, hormones, contact-based manipulation of the brain, etc.). Furthermore, the other parts of the self we consider as core components of the self, such as awareness, values and goal-driven action, are emergent properties we observe in a range of forms not only in humans but in other life forms, from algae to dogs.</text:p>
      <text:p text:style-name="Standard"/>
      <text:p text:style-name="Standard">But I would go one step further. A key part of what makes us what we are is the actions we take and the feedback we receive from our environment. This self-feeding loop of awareness and action cannot be understood without the environment. Yes, in some sense, we can talk about the “self” as self-contained, but contained in what? If in the<text:s/><text:soft-page-break/>brain, we miss out many key bodily details (e.g. hormones, abilities, actions, etc.) that shape this self-feeding loop. If in the body, we miss out on many key environmental details (e.g. specific facts to deal with, predictability or lack thereof, the strength, nature and diversity of forces, ideas conveyed by others, education, etc.). Hence, in a real sense, we cannot understand the “self” in its entirety in a self-contained way. Thus, not only is there no soul-body split, but there is also no absolute (i.e. ontological) soul-environment split. Whatever split can be made is contextual (e.g. studying the body while keeping the environment stable, studying the brain while keeping the body stable, etc.).</text:p>
      <text:p text:style-name="Standard"/>
      <text:h text:style-name="P455" text:outline-level="1"><text:bookmark-start text:name="_avkwoqsdog3h"/><text:bookmark-end text:name="_avkwoqsdog3h"/><text:soft-page-break/>Morality</text:h>
      <text:p text:style-name="Standard">Morality is not about feeling good or bad about yourself. It is about effective versus ineffective action toward what you consider worth gaining and/or keeping. Moral praise or criticism is not about blessing or condemnation but course-sustenance or course-correction, primarily for myself since I strive to be selfish but also, indirectly, for the one I praise or criticise, if it makes sense to them for their own goals and values. Hence, for an egoist, judgement is about one thing and one thing only word: orientation. Moral judgement, then, is moral orientation, i.e. orientation with respect to core value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style:font-style-complex="italic" fo:color="#666666" fo:font-size="11pt" style:font-size-asian="11pt" style:font-size-complex="11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00" style:display-name="ListLabel 100" style:family="text">
      <style:text-properties fo:color="#1155CC" style:text-underline-type="single" style:text-underline-style="solid" style:text-underline-width="auto" style:text-underline-mode="continuous" style:text-underline-color="font-color"/>
    </style:style>
    <style:style style:name="ListLabel101" style:display-name="ListLabel 101" style:family="text">
      <style:text-properties fo:font-style="italic" style:font-style-asian="italic" style:font-style-complex="italic" fo:color="#1155CC" style:text-underline-type="single" style:text-underline-style="solid" style:text-underline-width="auto" style:text-underline-mode="continuous" style:text-underline-color="font-color"/>
    </style:style>
    <style:style style:name="ListLabel102" style:display-name="ListLabel 102" style:family="text">
      <style:text-properties fo:color="#0000EE"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ranav Gopalkrishna</dc:creator>
    <meta:creation-date>2026-07-02T20:42:00Z</meta:creation-date>
    <dc:date>2026-07-02T20:43:00Z</dc:date>
    <meta:template xlink:href="Normal.dotm" xlink:type="simple"/>
    <meta:editing-cycles>2</meta:editing-cycles>
    <meta:editing-duration>PT60S</meta:editing-duration>
    <meta:document-statistic meta:page-count="65" meta:paragraph-count="315" meta:word-count="23597" meta:character-count="157788" meta:row-count="1120" meta:non-whitespace-character-count="134506"/>
  </office:meta>
</office:document-meta>
</file>